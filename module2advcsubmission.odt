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ystem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line-height-at-least="0.1979in"/>
      <style:text-properties style:font-name="Droid Sans Mono" fo:color="#657B83" fo:font-size="10.5pt" style:font-size-asian="10.5pt" fo:background-color="#FDF6E3"/>
    </style:style>
    <style:style style:name="P2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3" style:parent-style-name="Standard" style:family="paragraph">
      <style:paragraph-properties style:line-height-at-least="0.1979in"/>
    </style:style>
    <style:style style:name="T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" style:parent-style-name="DefaultParagraphFont" style:family="text">
      <style:text-properties style:font-name="Symbol" style:font-name-asian="Symbol" style:font-name-complex="Symbol" fo:color="#657B83" fo:font-size="10.5pt" style:font-size-asian="10.5pt" fo:background-color="#FDF6E3"/>
    </style:style>
    <style:style style:name="T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" style:parent-style-name="Standard" style:family="paragraph">
      <style:paragraph-properties style:line-height-at-least="0.1979in"/>
    </style:style>
    <style:style style:name="T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" style:parent-style-name="DefaultParagraphFont" style:family="text">
      <style:text-properties style:font-name="Symbol" style:font-name-asian="Symbol" style:font-name-complex="Symbol" fo:color="#657B83" fo:font-size="10.5pt" style:font-size-asian="10.5pt" fo:background-color="#FDF6E3"/>
    </style:style>
    <style:style style:name="T1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12" style:parent-style-name="Standard" style:family="paragraph">
      <style:paragraph-properties style:line-height-at-least="0.1979in"/>
    </style:style>
    <style:style style:name="T1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15" style:parent-style-name="Standard" style:family="paragraph">
      <style:paragraph-properties style:line-height-at-least="0.1979in"/>
    </style:style>
    <style:style style:name="T1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18" style:parent-style-name="Standard" style:family="paragraph">
      <style:paragraph-properties style:line-height-at-least="0.1979in"/>
    </style:style>
    <style:style style:name="T1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21" style:parent-style-name="Standard" style:family="paragraph">
      <style:paragraph-properties style:line-height-at-least="0.1979in"/>
    </style:style>
    <style:style style:name="T2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24" style:parent-style-name="Standard" style:family="paragraph">
      <style:paragraph-properties style:line-height-at-least="0.1979in"/>
    </style:style>
    <style:style style:name="T2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27" style:parent-style-name="Standard" style:family="paragraph">
      <style:paragraph-properties style:line-height-at-least="0.1979in"/>
    </style:style>
    <style:style style:name="P28" style:parent-style-name="Standard" style:family="paragraph">
      <style:paragraph-properties style:line-height-at-least="0.1979in"/>
    </style:style>
    <style:style style:name="T29" style:parent-style-name="DefaultParagraphFont" style:family="text">
      <style:text-properties style:font-name="Droid Sans Mono" fo:font-weight="bold" style:font-weight-asian="bold" fo:color="#268BD2" fo:font-size="10.5pt" style:font-size-asian="10.5pt" fo:background-color="#FDF6E3"/>
    </style:style>
    <style:style style:name="T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3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5" style:parent-style-name="Standard" style:family="paragraph">
      <style:paragraph-properties style:line-height-at-least="0.1979in"/>
    </style:style>
    <style:style style:name="T3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9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4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1" style:parent-style-name="Standard" style:family="paragraph">
      <style:paragraph-properties style:line-height-at-least="0.1979in"/>
    </style:style>
    <style:style style:name="T4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6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47" style:parent-style-name="Standard" style:family="paragraph">
      <style:paragraph-properties style:line-height-at-least="0.1979in"/>
    </style:style>
    <style:style style:name="T4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5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4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4" style:parent-style-name="Standard" style:family="paragraph">
      <style:paragraph-properties style:line-height-at-least="0.1979in"/>
    </style:style>
    <style:style style:name="T6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0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7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2" style:parent-style-name="Standard" style:family="paragraph">
      <style:paragraph-properties style:line-height-at-least="0.1979in"/>
    </style:style>
    <style:style style:name="T7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7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78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79" style:parent-style-name="Standard" style:family="paragraph">
      <style:paragraph-properties style:line-height-at-least="0.1979in"/>
    </style:style>
    <style:style style:name="T8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4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85" style:parent-style-name="Standard" style:family="paragraph">
      <style:paragraph-properties style:line-height-at-least="0.1979in"/>
    </style:style>
    <style:style style:name="P86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87" style:parent-style-name="Standard" style:family="paragraph">
      <style:paragraph-properties style:line-height-at-least="0.1979in"/>
    </style:style>
    <style:style style:name="T8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6" style:parent-style-name="Standard" style:family="paragraph">
      <style:paragraph-properties style:line-height-at-least="0.1979in"/>
    </style:style>
    <style:style style:name="T9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5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0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8" style:parent-style-name="Standard" style:family="paragraph">
      <style:paragraph-properties style:line-height-at-least="0.1979in"/>
    </style:style>
    <style:style style:name="T10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1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1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1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2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2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31" style:parent-style-name="Standard" style:family="paragraph">
      <style:paragraph-properties style:line-height-at-least="0.1979in"/>
    </style:style>
    <style:style style:name="T13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3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3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3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3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37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13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39" style:parent-style-name="Standard" style:family="paragraph">
      <style:paragraph-properties style:line-height-at-least="0.1979in"/>
    </style:style>
    <style:style style:name="T14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4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4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4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4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4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48" style:parent-style-name="Standard" style:family="paragraph">
      <style:paragraph-properties style:line-height-at-least="0.1979in"/>
    </style:style>
    <style:style style:name="T14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5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5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5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53" style:parent-style-name="Standard" style:family="paragraph">
      <style:paragraph-properties style:line-height-at-least="0.1979in"/>
    </style:style>
    <style:style style:name="T15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5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58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159" style:parent-style-name="Standard" style:family="paragraph">
      <style:paragraph-properties style:line-height-at-least="0.1979in"/>
    </style:style>
    <style:style style:name="T16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6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6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66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16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68" style:parent-style-name="Standard" style:family="paragraph">
      <style:paragraph-properties style:line-height-at-least="0.1979in"/>
    </style:style>
    <style:style style:name="T16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7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7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7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75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1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77" style:parent-style-name="Standard" style:family="paragraph">
      <style:paragraph-properties style:line-height-at-least="0.1979in"/>
    </style:style>
    <style:style style:name="T17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8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8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8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84" style:parent-style-name="Standard" style:family="paragraph">
      <style:paragraph-properties style:line-height-at-least="0.1979in"/>
    </style:style>
    <style:style style:name="T18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8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8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8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91" style:parent-style-name="Standard" style:family="paragraph">
      <style:paragraph-properties style:line-height-at-least="0.1979in"/>
    </style:style>
    <style:style style:name="T19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9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9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9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9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9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9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99" style:parent-style-name="Standard" style:family="paragraph">
      <style:paragraph-properties style:line-height-at-least="0.1979in"/>
    </style:style>
    <style:style style:name="T20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0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03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204" style:parent-style-name="Standard" style:family="paragraph">
      <style:paragraph-properties style:line-height-at-least="0.1979in"/>
    </style:style>
    <style:style style:name="T20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0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0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08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209" style:parent-style-name="Standard" style:family="paragraph">
      <style:paragraph-properties style:line-height-at-least="0.1979in"/>
    </style:style>
    <style:style style:name="T21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1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1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1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1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1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17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218" style:parent-style-name="Standard" style:family="paragraph">
      <style:paragraph-properties style:line-height-at-least="0.1979in"/>
    </style:style>
    <style:style style:name="P219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220" style:parent-style-name="Standard" style:family="paragraph">
      <style:paragraph-properties style:line-height-at-least="0.1979in"/>
    </style:style>
    <style:style style:name="P221" style:parent-style-name="Standard" style:family="paragraph">
      <style:paragraph-properties style:line-height-at-least="0.1979in"/>
    </style:style>
    <style:style style:name="T22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2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2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2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2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31" style:parent-style-name="Standard" style:family="paragraph">
      <style:paragraph-properties style:line-height-at-least="0.1979in"/>
    </style:style>
    <style:style style:name="T23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3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3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38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23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40" style:parent-style-name="Standard" style:family="paragraph">
      <style:paragraph-properties style:line-height-at-least="0.1979in"/>
    </style:style>
    <style:style style:name="T24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4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4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4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4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4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47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24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49" style:parent-style-name="Standard" style:family="paragraph">
      <style:paragraph-properties style:line-height-at-least="0.1979in"/>
    </style:style>
    <style:style style:name="T25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5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5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5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5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5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56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2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5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5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6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6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6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6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6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6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6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68" style:parent-style-name="Standard" style:family="paragraph">
      <style:paragraph-properties style:line-height-at-least="0.1979in"/>
    </style:style>
    <style:style style:name="T26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7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7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73" style:parent-style-name="Standard" style:family="paragraph">
      <style:paragraph-properties style:line-height-at-least="0.1979in"/>
    </style:style>
    <style:style style:name="T27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7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7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277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27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2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80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281" style:parent-style-name="Standard" style:family="paragraph">
      <style:paragraph-properties style:line-height-at-least="0.1979in"/>
    </style:style>
    <style:style style:name="T28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8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8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86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287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288" style:parent-style-name="Standard" style:family="paragraph">
      <style:paragraph-properties style:line-height-at-least="0.1979in"/>
    </style:style>
    <style:style style:name="T28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9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9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2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294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9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29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297" style:parent-style-name="Standard" style:family="paragraph">
      <style:paragraph-properties style:line-height-at-least="0.1979in"/>
    </style:style>
    <style:style style:name="T29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29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0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0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0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0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04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30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06" style:parent-style-name="Standard" style:family="paragraph">
      <style:paragraph-properties style:line-height-at-least="0.1979in"/>
    </style:style>
    <style:style style:name="T30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30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0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1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1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1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13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31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15" style:parent-style-name="Standard" style:family="paragraph">
      <style:paragraph-properties style:line-height-at-least="0.1979in"/>
    </style:style>
    <style:style style:name="T31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1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1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31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2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2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22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32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2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2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2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2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2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2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3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3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3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34" style:parent-style-name="Standard" style:family="paragraph">
      <style:paragraph-properties style:line-height-at-least="0.1979in"/>
    </style:style>
    <style:style style:name="T33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3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3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3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39" style:parent-style-name="Standard" style:family="paragraph">
      <style:paragraph-properties style:line-height-at-least="0.1979in"/>
    </style:style>
    <style:style style:name="T34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4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343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34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3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46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347" style:parent-style-name="Standard" style:family="paragraph">
      <style:paragraph-properties style:line-height-at-least="0.1979in"/>
    </style:style>
    <style:style style:name="T34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4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5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5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52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353" style:parent-style-name="Standard" style:family="paragraph">
      <style:paragraph-properties style:line-height-at-least="0.1979in"/>
    </style:style>
    <style:style style:name="P354" style:parent-style-name="Standard" style:family="paragraph">
      <style:paragraph-properties style:line-height-at-least="0.1979in"/>
    </style:style>
    <style:style style:name="T355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35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5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5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59" style:parent-style-name="Standard" style:family="paragraph">
      <style:paragraph-properties style:line-height-at-least="0.1979in"/>
    </style:style>
    <style:style style:name="T360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3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6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64" style:parent-style-name="Standard" style:family="paragraph">
      <style:paragraph-properties style:line-height-at-least="0.1979in"/>
    </style:style>
    <style:style style:name="T365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36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6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6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69" style:parent-style-name="Standard" style:family="paragraph">
      <style:paragraph-properties style:line-height-at-least="0.1979in"/>
    </style:style>
    <style:style style:name="T370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37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7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7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74" style:parent-style-name="Standard" style:family="paragraph">
      <style:paragraph-properties style:line-height-at-least="0.1979in"/>
    </style:style>
    <style:style style:name="T37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7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37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79" style:parent-style-name="Standard" style:family="paragraph">
      <style:paragraph-properties style:line-height-at-least="0.1979in"/>
    </style:style>
    <style:style style:name="T38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3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8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84" style:parent-style-name="Standard" style:family="paragraph">
      <style:paragraph-properties style:line-height-at-least="0.1979in"/>
    </style:style>
    <style:style style:name="T38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8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8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388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38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3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9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394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395" style:parent-style-name="Standard" style:family="paragraph">
      <style:paragraph-properties style:line-height-at-least="0.1979in"/>
    </style:style>
    <style:style style:name="T39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3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39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39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0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0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0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0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0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08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409" style:parent-style-name="Standard" style:family="paragraph">
      <style:paragraph-properties style:line-height-at-least="0.1979in"/>
    </style:style>
    <style:style style:name="T41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1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1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1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1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1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1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1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1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2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21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422" style:parent-style-name="Standard" style:family="paragraph">
      <style:paragraph-properties style:line-height-at-least="0.1979in"/>
    </style:style>
    <style:style style:name="T42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2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2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2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2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2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3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3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3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34" style:parent-style-name="Standard" style:family="paragraph">
      <style:paragraph-properties style:line-height-at-least="0.1979in"/>
    </style:style>
    <style:style style:name="P435" style:parent-style-name="Standard" style:family="paragraph">
      <style:paragraph-properties style:line-height-at-least="0.1979in"/>
    </style:style>
    <style:style style:name="T436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4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3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43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4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4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4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43" style:parent-style-name="Standard" style:family="paragraph">
      <style:paragraph-properties style:line-height-at-least="0.1979in"/>
    </style:style>
    <style:style style:name="P444" style:parent-style-name="Standard" style:family="paragraph">
      <style:paragraph-properties style:line-height-at-least="0.1979in"/>
    </style:style>
    <style:style style:name="T44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4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4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4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4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45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5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5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5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5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55" style:parent-style-name="Standard" style:family="paragraph">
      <style:paragraph-properties style:line-height-at-least="0.1979in"/>
    </style:style>
    <style:style style:name="T45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5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459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46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461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46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4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6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6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46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6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69" style:parent-style-name="Standard" style:family="paragraph">
      <style:paragraph-properties style:line-height-at-least="0.1979in"/>
    </style:style>
    <style:style style:name="P470" style:parent-style-name="Standard" style:family="paragraph">
      <style:paragraph-properties style:line-height-at-least="0.1979in"/>
    </style:style>
    <style:style style:name="T47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7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7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7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77" style:parent-style-name="Standard" style:family="paragraph">
      <style:paragraph-properties style:line-height-at-least="0.1979in"/>
    </style:style>
    <style:style style:name="T47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8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48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4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484" style:parent-style-name="Standard" style:family="paragraph">
      <style:paragraph-properties style:line-height-at-least="0.1979in"/>
    </style:style>
    <style:style style:name="P485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486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87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88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89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0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1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2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3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4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5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6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7" style:parent-style-name="Standard" style:family="paragraph">
      <style:text-properties style:font-name="Droid Sans Mono" fo:color="#859900" fo:font-size="10.5pt" style:font-size-asian="10.5pt" fo:background-color="#FDF6E3"/>
    </style:style>
    <style:style style:name="P498" style:parent-style-name="Standard" style:family="paragraph">
      <style:text-properties style:font-name="Droid Sans Mono" fo:color="#859900" fo:font-size="10.5pt" style:font-size-asian="10.5pt" fo:background-color="#FDF6E3"/>
    </style:style>
    <style:style style:name="T499" style:parent-style-name="DefaultParagraphFont" style:family="text">
      <style:text-properties style:font-name="Symbol" style:font-name-asian="Symbol" style:font-name-complex="Symbol" fo:color="#859900" fo:font-size="10.5pt" style:font-size-asian="10.5pt" fo:background-color="#FDF6E3"/>
    </style:style>
    <style:style style:name="T50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01" style:parent-style-name="DefaultParagraphFont" style:family="text">
      <style:text-properties style:font-name="Symbol" style:font-name-asian="Symbol" style:font-name-complex="Symbol" fo:color="#859900" fo:font-size="10.5pt" style:font-size-asian="10.5pt" fo:background-color="#FDF6E3"/>
    </style:style>
    <style:style style:name="T50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P503" style:parent-style-name="Standard" style:family="paragraph">
      <style:text-properties style:font-name="Droid Sans Mono" fo:color="#859900" fo:font-size="10.5pt" style:font-size-asian="10.5pt" fo:background-color="#FDF6E3"/>
    </style:style>
    <style:style style:name="P504" style:parent-style-name="Standard" style:family="paragraph">
      <style:text-properties style:font-name="Droid Sans Mono" fo:color="#859900" fo:font-size="10.5pt" style:font-size-asian="10.5pt" fo:background-color="#FDF6E3"/>
    </style:style>
    <style:style style:name="T50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06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0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08" style:parent-style-name="Standard" style:family="paragraph">
      <style:paragraph-properties style:line-height-at-least="0.1979in"/>
    </style:style>
    <style:style style:name="T50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10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1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12" style:parent-style-name="Standard" style:family="paragraph">
      <style:paragraph-properties style:line-height-at-least="0.1979in"/>
    </style:style>
    <style:style style:name="T51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14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15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16" style:parent-style-name="Standard" style:family="paragraph">
      <style:paragraph-properties style:line-height-at-least="0.1979in"/>
    </style:style>
    <style:style style:name="T51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18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1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20" style:parent-style-name="Standard" style:family="paragraph">
      <style:paragraph-properties style:line-height-at-least="0.1979in"/>
    </style:style>
    <style:style style:name="T52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22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2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24" style:parent-style-name="Standard" style:family="paragraph">
      <style:paragraph-properties style:line-height-at-least="0.1979in"/>
    </style:style>
    <style:style style:name="T52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26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2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28" style:parent-style-name="Standard" style:family="paragraph">
      <style:paragraph-properties style:line-height-at-least="0.1979in"/>
    </style:style>
    <style:style style:name="T52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30" style:parent-style-name="DefaultParagraphFont" style:family="text">
      <style:text-properties style:font-name="Droid Sans Mono" fo:color="#B58900" fo:font-size="10.5pt" style:font-size-asian="10.5pt" fo:background-color="#FDF6E3"/>
    </style:style>
    <style:style style:name="T53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P532" style:parent-style-name="Standard" style:family="paragraph">
      <style:paragraph-properties style:line-height-at-least="0.1979in"/>
    </style:style>
    <style:style style:name="P533" style:parent-style-name="Standard" style:family="paragraph">
      <style:paragraph-properties style:line-height-at-least="0.1979in"/>
    </style:style>
    <style:style style:name="T534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5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3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3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53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540" style:parent-style-name="Standard" style:family="paragraph">
      <style:paragraph-properties style:line-height-at-least="0.1979in"/>
    </style:style>
    <style:style style:name="T54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4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4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544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545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546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54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54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549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550" style:parent-style-name="Standard" style:family="paragraph">
      <style:paragraph-properties style:line-height-at-least="0.1979in"/>
    </style:style>
    <style:style style:name="P551" style:parent-style-name="Standard" style:family="paragraph">
      <style:paragraph-properties style:line-height-at-least="0.1979in"/>
    </style:style>
    <style:style style:name="T552" style:parent-style-name="DefaultParagraphFont" style:family="text">
      <style:text-properties style:font-name="Droid Sans Mono" fo:font-weight="bold" style:font-weight-asian="bold" fo:color="#268BD2" fo:font-size="10.5pt" style:font-size-asian="10.5pt" fo:background-color="#FDF6E3"/>
    </style:style>
    <style:style style:name="T55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5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56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5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558" style:parent-style-name="Standard" style:family="paragraph">
      <style:paragraph-properties style:line-height-at-least="0.1979in"/>
    </style:style>
    <style:style style:name="T55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6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6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6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63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56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6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6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6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6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569" style:parent-style-name="Standard" style:family="paragraph">
      <style:paragraph-properties style:line-height-at-least="0.1979in"/>
    </style:style>
    <style:style style:name="T57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7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7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57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7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7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7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7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78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5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8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8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8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8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8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8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8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8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591" style:parent-style-name="Standard" style:family="paragraph">
      <style:paragraph-properties style:line-height-at-least="0.1979in"/>
    </style:style>
    <style:style style:name="T59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9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9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9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5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59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59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00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60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0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0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0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0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06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607" style:parent-style-name="Standard" style:family="paragraph">
      <style:paragraph-properties style:line-height-at-least="0.1979in"/>
    </style:style>
    <style:style style:name="T60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0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1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12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613" style:parent-style-name="Standard" style:family="paragraph">
      <style:paragraph-properties style:line-height-at-least="0.1979in"/>
    </style:style>
    <style:style style:name="P614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615" style:parent-style-name="Standard" style:family="paragraph">
      <style:paragraph-properties style:line-height-at-least="0.1979in"/>
    </style:style>
    <style:style style:name="T616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1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1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1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2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2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2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2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24" style:parent-style-name="Standard" style:family="paragraph">
      <style:paragraph-properties style:line-height-at-least="0.1979in"/>
    </style:style>
    <style:style style:name="T625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2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2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3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3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3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3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36" style:parent-style-name="Standard" style:family="paragraph">
      <style:paragraph-properties style:line-height-at-least="0.1979in"/>
    </style:style>
    <style:style style:name="T63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3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3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4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4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4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4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46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4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4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4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5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5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5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5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5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55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5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5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5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59" style:parent-style-name="Standard" style:family="paragraph">
      <style:paragraph-properties style:line-height-at-least="0.1979in"/>
    </style:style>
    <style:style style:name="T66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6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6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6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6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68" style:parent-style-name="Standard" style:family="paragraph">
      <style:paragraph-properties style:line-height-at-least="0.1979in"/>
    </style:style>
    <style:style style:name="T66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7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672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67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6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75" style:parent-style-name="Standard" style:family="paragraph">
      <style:paragraph-properties style:line-height-at-least="0.1979in"/>
    </style:style>
    <style:style style:name="T67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7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7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80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681" style:parent-style-name="Standard" style:family="paragraph">
      <style:paragraph-properties style:line-height-at-least="0.1979in"/>
    </style:style>
    <style:style style:name="T68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8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8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8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8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87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6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89" style:parent-style-name="Standard" style:family="paragraph">
      <style:paragraph-properties style:line-height-at-least="0.1979in"/>
    </style:style>
    <style:style style:name="T69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69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6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9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69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696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6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698" style:parent-style-name="Standard" style:family="paragraph">
      <style:paragraph-properties style:line-height-at-least="0.1979in"/>
    </style:style>
    <style:style style:name="T69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0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0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05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70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07" style:parent-style-name="Standard" style:family="paragraph">
      <style:paragraph-properties style:line-height-at-least="0.1979in"/>
    </style:style>
    <style:style style:name="T70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0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1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1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1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1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1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16" style:parent-style-name="Standard" style:family="paragraph">
      <style:paragraph-properties style:line-height-at-least="0.1979in"/>
    </style:style>
    <style:style style:name="T71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1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1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2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2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2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23" style:parent-style-name="Standard" style:family="paragraph">
      <style:paragraph-properties style:line-height-at-least="0.1979in"/>
    </style:style>
    <style:style style:name="T72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2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2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2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31" style:parent-style-name="Standard" style:family="paragraph">
      <style:paragraph-properties style:line-height-at-least="0.1979in"/>
    </style:style>
    <style:style style:name="T73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3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3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35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736" style:parent-style-name="Standard" style:family="paragraph">
      <style:paragraph-properties style:line-height-at-least="0.1979in"/>
    </style:style>
    <style:style style:name="T73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3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3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40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741" style:parent-style-name="Standard" style:family="paragraph">
      <style:paragraph-properties style:line-height-at-least="0.1979in"/>
    </style:style>
    <style:style style:name="T74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4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44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4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4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4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4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49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750" style:parent-style-name="Standard" style:family="paragraph">
      <style:paragraph-properties style:line-height-at-least="0.1979in"/>
    </style:style>
    <style:style style:name="P751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752" style:parent-style-name="Standard" style:family="paragraph">
      <style:paragraph-properties style:line-height-at-least="0.1979in"/>
    </style:style>
    <style:style style:name="T75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5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5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5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5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6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62" style:parent-style-name="Standard" style:family="paragraph">
      <style:paragraph-properties style:line-height-at-least="0.1979in"/>
    </style:style>
    <style:style style:name="T76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6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6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6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6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6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69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7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71" style:parent-style-name="DefaultParagraphFont" style:family="text">
      <style:text-properties style:font-name="Droid Sans Mono" fo:color="#93A1A1" fo:font-size="10.5pt" style:font-size-asian="10.5pt" fo:background-color="#FDF6E3"/>
    </style:style>
    <style:style style:name="T772" style:parent-style-name="DefaultParagraphFont" style:family="text">
      <style:text-properties style:font-name="Droid Sans Mono" fo:font-style="italic" style:font-style-asian="italic" fo:color="#93A1A1" fo:font-size="10.5pt" style:font-size-asian="10.5pt" fo:background-color="#FDF6E3"/>
    </style:style>
    <style:style style:name="P773" style:parent-style-name="Standard" style:family="paragraph">
      <style:paragraph-properties style:line-height-at-least="0.1979in"/>
    </style:style>
    <style:style style:name="T774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7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7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7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7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80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7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782" style:parent-style-name="Standard" style:family="paragraph">
      <style:paragraph-properties style:line-height-at-least="0.1979in"/>
    </style:style>
    <style:style style:name="T78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8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85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78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8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8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91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79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9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9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9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79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9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79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79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0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0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0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0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0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0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09" style:parent-style-name="Standard" style:family="paragraph">
      <style:paragraph-properties style:line-height-at-least="0.1979in"/>
    </style:style>
    <style:style style:name="T81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1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1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14" style:parent-style-name="Standard" style:family="paragraph">
      <style:paragraph-properties style:line-height-at-least="0.1979in"/>
    </style:style>
    <style:style style:name="T81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1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1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818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81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82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21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822" style:parent-style-name="Standard" style:family="paragraph">
      <style:paragraph-properties style:line-height-at-least="0.1979in"/>
    </style:style>
    <style:style style:name="T82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2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27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828" style:parent-style-name="Standard" style:family="paragraph">
      <style:paragraph-properties style:line-height-at-least="0.1979in"/>
    </style:style>
    <style:style style:name="P829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830" style:parent-style-name="Standard" style:family="paragraph">
      <style:paragraph-properties style:line-height-at-least="0.1979in"/>
    </style:style>
    <style:style style:name="T83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3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3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36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3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3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39" style:parent-style-name="Standard" style:family="paragraph">
      <style:paragraph-properties style:line-height-at-least="0.1979in"/>
    </style:style>
    <style:style style:name="T84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4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4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4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46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84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48" style:parent-style-name="DefaultParagraphFont" style:family="text">
      <style:text-properties style:font-name="Droid Sans Mono" fo:color="#93A1A1" fo:font-size="10.5pt" style:font-size-asian="10.5pt" fo:background-color="#FDF6E3"/>
    </style:style>
    <style:style style:name="T849" style:parent-style-name="DefaultParagraphFont" style:family="text">
      <style:text-properties style:font-name="Droid Sans Mono" fo:font-style="italic" style:font-style-asian="italic" fo:color="#93A1A1" fo:font-size="10.5pt" style:font-size-asian="10.5pt" fo:background-color="#FDF6E3"/>
    </style:style>
    <style:style style:name="P850" style:parent-style-name="Standard" style:family="paragraph">
      <style:paragraph-properties style:line-height-at-least="0.1979in"/>
    </style:style>
    <style:style style:name="T85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5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5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5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5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5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57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85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59" style:parent-style-name="Standard" style:family="paragraph">
      <style:paragraph-properties style:line-height-at-least="0.1979in"/>
    </style:style>
    <style:style style:name="T86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6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62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8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6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6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6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68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86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7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7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7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7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7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7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7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7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7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8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8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8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8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8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86" style:parent-style-name="Standard" style:family="paragraph">
      <style:paragraph-properties style:line-height-at-least="0.1979in"/>
    </style:style>
    <style:style style:name="T88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8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91" style:parent-style-name="Standard" style:family="paragraph">
      <style:paragraph-properties style:line-height-at-least="0.1979in"/>
    </style:style>
    <style:style style:name="T8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8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89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895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89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8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898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899" style:parent-style-name="Standard" style:family="paragraph">
      <style:paragraph-properties style:line-height-at-least="0.1979in"/>
    </style:style>
    <style:style style:name="T90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0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0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0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04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905" style:parent-style-name="Standard" style:family="paragraph">
      <style:paragraph-properties style:line-height-at-least="0.1979in"/>
    </style:style>
    <style:style style:name="P906" style:parent-style-name="Standard" style:family="paragraph">
      <style:paragraph-properties style:line-height-at-least="0.1979in"/>
    </style:style>
    <style:style style:name="T90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0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0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1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11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912" style:parent-style-name="Standard" style:family="paragraph">
      <style:paragraph-properties style:line-height-at-least="0.1979in"/>
    </style:style>
    <style:style style:name="T91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1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1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1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1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1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19" style:parent-style-name="Standard" style:family="paragraph">
      <style:paragraph-properties style:line-height-at-least="0.1979in"/>
    </style:style>
    <style:style style:name="P920" style:parent-style-name="Standard" style:family="paragraph">
      <style:paragraph-properties style:line-height-at-least="0.1979in"/>
    </style:style>
    <style:style style:name="T921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2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2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2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2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29" style:parent-style-name="Standard" style:family="paragraph">
      <style:paragraph-properties style:line-height-at-least="0.1979in"/>
    </style:style>
    <style:style style:name="T93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3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3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3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36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9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38" style:parent-style-name="DefaultParagraphFont" style:family="text">
      <style:text-properties style:font-name="Droid Sans Mono" fo:color="#93A1A1" fo:font-size="10.5pt" style:font-size-asian="10.5pt" fo:background-color="#FDF6E3"/>
    </style:style>
    <style:style style:name="T939" style:parent-style-name="DefaultParagraphFont" style:family="text">
      <style:text-properties style:font-name="Droid Sans Mono" fo:font-style="italic" style:font-style-asian="italic" fo:color="#93A1A1" fo:font-size="10.5pt" style:font-size-asian="10.5pt" fo:background-color="#FDF6E3"/>
    </style:style>
    <style:style style:name="P940" style:parent-style-name="Standard" style:family="paragraph">
      <style:paragraph-properties style:line-height-at-least="0.1979in"/>
    </style:style>
    <style:style style:name="T941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4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43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94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4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4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4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48" style:parent-style-name="Standard" style:family="paragraph">
      <style:paragraph-properties style:line-height-at-least="0.1979in"/>
    </style:style>
    <style:style style:name="T949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5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5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5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5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5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55" style:parent-style-name="Standard" style:family="paragraph">
      <style:paragraph-properties style:line-height-at-least="0.1979in"/>
    </style:style>
    <style:style style:name="P956" style:parent-style-name="Standard" style:family="paragraph">
      <style:paragraph-properties style:line-height-at-least="0.1979in"/>
    </style:style>
    <style:style style:name="T95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5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5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60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6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6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63" style:parent-style-name="Standard" style:family="paragraph">
      <style:paragraph-properties style:line-height-at-least="0.1979in"/>
    </style:style>
    <style:style style:name="T96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6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67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6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6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70" style:parent-style-name="Standard" style:family="paragraph">
      <style:paragraph-properties style:line-height-at-least="0.1979in"/>
    </style:style>
    <style:style style:name="T97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7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7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74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75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77" style:parent-style-name="Standard" style:family="paragraph">
      <style:paragraph-properties style:line-height-at-least="0.1979in"/>
    </style:style>
    <style:style style:name="T97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8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81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98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9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84" style:parent-style-name="Standard" style:family="paragraph">
      <style:paragraph-properties style:line-height-at-least="0.1979in"/>
    </style:style>
    <style:style style:name="T98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8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87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8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9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9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9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993" style:parent-style-name="Standard" style:family="paragraph">
      <style:paragraph-properties style:line-height-at-least="0.1979in"/>
    </style:style>
    <style:style style:name="P994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995" style:parent-style-name="Standard" style:family="paragraph">
      <style:paragraph-properties style:line-height-at-least="0.1979in"/>
    </style:style>
    <style:style style:name="T99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9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998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99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0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0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0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0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0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08" style:parent-style-name="Standard" style:family="paragraph">
      <style:paragraph-properties style:line-height-at-least="0.1979in"/>
    </style:style>
    <style:style style:name="T100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1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1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1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1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1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1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1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1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1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1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20" style:parent-style-name="Standard" style:family="paragraph">
      <style:paragraph-properties style:line-height-at-least="0.1979in"/>
    </style:style>
    <style:style style:name="T102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2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2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2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2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2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2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2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2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3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3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32" style:parent-style-name="Standard" style:family="paragraph">
      <style:paragraph-properties style:line-height-at-least="0.1979in"/>
    </style:style>
    <style:style style:name="P1033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1034" style:parent-style-name="Standard" style:family="paragraph">
      <style:paragraph-properties style:line-height-at-least="0.1979in"/>
    </style:style>
    <style:style style:name="T103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3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3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3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39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04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4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4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4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45" style:parent-style-name="Standard" style:family="paragraph">
      <style:paragraph-properties style:line-height-at-least="0.1979in"/>
    </style:style>
    <style:style style:name="T104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4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4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4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5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5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5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5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54" style:parent-style-name="Standard" style:family="paragraph">
      <style:paragraph-properties style:line-height-at-least="0.1979in"/>
    </style:style>
    <style:style style:name="T105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5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5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058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05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060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06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06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6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6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66" style:parent-style-name="Standard" style:family="paragraph">
      <style:paragraph-properties style:line-height-at-least="0.1979in"/>
    </style:style>
    <style:style style:name="T106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6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6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71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1072" style:parent-style-name="Standard" style:family="paragraph">
      <style:paragraph-properties style:line-height-at-least="0.1979in"/>
    </style:style>
    <style:style style:name="T107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7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7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7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79" style:parent-style-name="Standard" style:family="paragraph">
      <style:paragraph-properties style:line-height-at-least="0.1979in"/>
    </style:style>
    <style:style style:name="T108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8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8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8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8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8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86" style:parent-style-name="Standard" style:family="paragraph">
      <style:paragraph-properties style:line-height-at-least="0.1979in"/>
    </style:style>
    <style:style style:name="P1087" style:parent-style-name="Standard" style:family="paragraph">
      <style:paragraph-properties style:line-height-at-least="0.1979in"/>
    </style:style>
    <style:style style:name="T108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8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90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09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9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09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096" style:parent-style-name="Standard" style:family="paragraph">
      <style:paragraph-properties style:line-height-at-least="0.1979in"/>
    </style:style>
    <style:style style:name="T1097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09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09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0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0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0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0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0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0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0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0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09" style:parent-style-name="Standard" style:family="paragraph">
      <style:paragraph-properties style:line-height-at-least="0.1979in"/>
    </style:style>
    <style:style style:name="T111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1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1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13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1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15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1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1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1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1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20" style:parent-style-name="Standard" style:family="paragraph">
      <style:paragraph-properties fo:margin-bottom="0.1965in" style:line-height-at-least="0.1979in"/>
    </style:style>
    <style:style style:name="P1121" style:parent-style-name="Standard" style:family="paragraph">
      <style:paragraph-properties style:line-height-at-least="0.1979in"/>
    </style:style>
    <style:style style:name="T112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2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2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25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2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2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28" style:parent-style-name="Standard" style:family="paragraph">
      <style:paragraph-properties style:line-height-at-least="0.1979in"/>
    </style:style>
    <style:style style:name="T112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3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31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32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33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3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35" style:parent-style-name="Standard" style:family="paragraph">
      <style:paragraph-properties style:line-height-at-least="0.1979in"/>
    </style:style>
    <style:style style:name="T113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3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39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4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42" style:parent-style-name="Standard" style:family="paragraph">
      <style:paragraph-properties style:line-height-at-least="0.1979in"/>
    </style:style>
    <style:style style:name="T114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4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4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4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4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4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49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5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51" style:parent-style-name="Standard" style:family="paragraph">
      <style:paragraph-properties style:line-height-at-least="0.1979in"/>
    </style:style>
    <style:style style:name="P1152" style:parent-style-name="Standard" style:family="paragraph">
      <style:paragraph-properties style:line-height-at-least="0.1979in"/>
      <style:text-properties style:font-name="Droid Sans Mono" fo:font-style="italic" style:font-style-asian="italic" fo:color="#93A1A1" fo:font-size="10.5pt" style:font-size-asian="10.5pt" fo:background-color="#FDF6E3"/>
    </style:style>
    <style:style style:name="P1153" style:parent-style-name="Standard" style:family="paragraph">
      <style:paragraph-properties style:line-height-at-least="0.1979in"/>
    </style:style>
    <style:style style:name="T115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5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5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58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15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6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161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6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6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6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65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6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6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68" style:parent-style-name="Standard" style:family="paragraph">
      <style:paragraph-properties style:line-height-at-least="0.1979in"/>
    </style:style>
    <style:style style:name="T1169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7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7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7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7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7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7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7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77" style:parent-style-name="Standard" style:family="paragraph">
      <style:paragraph-properties style:line-height-at-least="0.1979in"/>
    </style:style>
    <style:style style:name="T117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7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8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81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8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83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184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8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86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18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8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89" style:parent-style-name="Standard" style:family="paragraph">
      <style:paragraph-properties style:line-height-at-least="0.1979in"/>
    </style:style>
    <style:style style:name="T119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9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9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9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194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P1195" style:parent-style-name="Standard" style:family="paragraph">
      <style:paragraph-properties style:line-height-at-least="0.1979in"/>
    </style:style>
    <style:style style:name="T119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19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19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199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20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0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02" style:parent-style-name="Standard" style:family="paragraph">
      <style:paragraph-properties style:line-height-at-least="0.1979in"/>
    </style:style>
    <style:style style:name="T120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0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0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0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07" style:parent-style-name="Standard" style:family="paragraph">
      <style:paragraph-properties style:line-height-at-least="0.1979in"/>
    </style:style>
    <style:style style:name="T120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0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10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11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212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1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14" style:parent-style-name="Standard" style:family="paragraph">
      <style:paragraph-properties style:line-height-at-least="0.1979in"/>
    </style:style>
    <style:style style:name="T121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1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1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1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19" style:parent-style-name="Standard" style:family="paragraph">
      <style:paragraph-properties style:line-height-at-least="0.1979in"/>
    </style:style>
    <style:style style:name="P1220" style:parent-style-name="Standard" style:family="paragraph">
      <style:paragraph-properties style:line-height-at-least="0.1979in"/>
    </style:style>
    <style:style style:name="T122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2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23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22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25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26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27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28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29" style:parent-style-name="Standard" style:family="paragraph">
      <style:paragraph-properties style:line-height-at-least="0.1979in"/>
    </style:style>
    <style:style style:name="T1230" style:parent-style-name="DefaultParagraphFont" style:family="text">
      <style:text-properties style:font-name="Droid Sans Mono" fo:font-weight="bold" style:font-weight-asian="bold" fo:color="#586E75" fo:font-size="10.5pt" style:font-size-asian="10.5pt" fo:background-color="#FDF6E3"/>
    </style:style>
    <style:style style:name="T123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32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3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34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23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36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37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38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3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40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41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42" style:parent-style-name="Standard" style:family="paragraph">
      <style:paragraph-properties style:line-height-at-least="0.1979in"/>
    </style:style>
    <style:style style:name="T1243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44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45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46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247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48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249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50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51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52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53" style:parent-style-name="Standard" style:family="paragraph">
      <style:paragraph-properties style:line-height-at-least="0.1979in"/>
    </style:style>
    <style:style style:name="T1254" style:parent-style-name="DefaultParagraphFont" style:family="text">
      <style:text-properties style:font-name="Droid Sans Mono" fo:color="#268BD2" fo:font-size="10.5pt" style:font-size-asian="10.5pt" fo:background-color="#FDF6E3"/>
    </style:style>
    <style:style style:name="T125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56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57" style:parent-style-name="DefaultParagraphFont" style:family="text">
      <style:text-properties style:font-name="Droid Sans Mono" fo:color="#CB4B16" fo:font-size="10.5pt" style:font-size-asian="10.5pt" fo:background-color="#FDF6E3"/>
    </style:style>
    <style:style style:name="T1258" style:parent-style-name="DefaultParagraphFont" style:family="text">
      <style:text-properties style:font-name="Droid Sans Mono" fo:color="#2AA198" fo:font-size="10.5pt" style:font-size-asian="10.5pt" fo:background-color="#FDF6E3"/>
    </style:style>
    <style:style style:name="T1259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60" style:parent-style-name="Standard" style:family="paragraph">
      <style:paragraph-properties style:line-height-at-least="0.1979in"/>
    </style:style>
    <style:style style:name="P1261" style:parent-style-name="Standard" style:family="paragraph">
      <style:paragraph-properties style:line-height-at-least="0.1979in"/>
    </style:style>
    <style:style style:name="T1262" style:parent-style-name="DefaultParagraphFont" style:family="text">
      <style:text-properties style:font-name="Droid Sans Mono" fo:color="#859900" fo:font-size="10.5pt" style:font-size-asian="10.5pt" fo:background-color="#FDF6E3"/>
    </style:style>
    <style:style style:name="T1263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T1264" style:parent-style-name="DefaultParagraphFont" style:family="text">
      <style:text-properties style:font-name="Droid Sans Mono" fo:color="#D33682" fo:font-size="10.5pt" style:font-size-asian="10.5pt" fo:background-color="#FDF6E3"/>
    </style:style>
    <style:style style:name="T1265" style:parent-style-name="DefaultParagraphFont" style:family="text">
      <style:text-properties style:font-name="Droid Sans Mono" fo:color="#657B83" fo:font-size="10.5pt" style:font-size-asian="10.5pt" fo:background-color="#FDF6E3"/>
    </style:style>
    <style:style style:name="P1266" style:parent-style-name="Standard" style:family="paragraph">
      <style:paragraph-properties style:line-height-at-least="0.1979in"/>
      <style:text-properties style:font-name="Droid Sans Mono" fo:color="#657B83" fo:font-size="10.5pt" style:font-size-asian="10.5pt" fo:background-color="#FDF6E3"/>
    </style:style>
    <style:style style:name="T1267" style:parent-style-name="DefaultParagraphFont" style:family="text">
      <style:text-properties style:font-name="Google Sans"/>
    </style:style>
    <style:style style:name="T1268" style:parent-style-name="SourceText" style:family="text">
      <style:text-properties style:font-name="Google Sans Text"/>
    </style:style>
    <style:style style:name="P1269" style:parent-style-name="Textbody" style:family="paragraph">
      <style:paragraph-properties fo:line-height="112%"/>
    </style:style>
    <style:style style:name="T1270" style:parent-style-name="DefaultParagraphFont" style:family="text">
      <style:text-properties style:font-name="Google Sans Text" fo:font-weight="bold" style:font-weight-asian="bold"/>
    </style:style>
    <style:style style:name="T1271" style:parent-style-name="DefaultParagraphFont" style:family="text">
      <style:text-properties style:font-name="Google Sans Text"/>
    </style:style>
    <style:style style:name="P1272" style:parent-style-name="Textbody" style:family="paragraph">
      <style:paragraph-properties fo:line-height="112%"/>
    </style:style>
    <style:style style:name="T1273" style:parent-style-name="DefaultParagraphFont" style:family="text">
      <style:text-properties style:font-name="Google Sans Text" fo:font-weight="bold" style:font-weight-asian="bold"/>
    </style:style>
    <style:style style:name="T1274" style:parent-style-name="DefaultParagraphFont" style:family="text">
      <style:text-properties style:font-name="Google Sans Text"/>
    </style:style>
    <style:style style:name="T1275" style:parent-style-name="SourceText" style:family="text">
      <style:text-properties style:font-name="Google Sans Text"/>
    </style:style>
    <style:style style:name="T1276" style:parent-style-name="DefaultParagraphFont" style:family="text">
      <style:text-properties style:font-name="Google Sans Text"/>
    </style:style>
    <style:style style:name="P1277" style:parent-style-name="Textbody" style:family="paragraph">
      <style:paragraph-properties fo:line-height="112%"/>
    </style:style>
    <style:style style:name="T1278" style:parent-style-name="DefaultParagraphFont" style:family="text">
      <style:text-properties style:font-name="Google Sans Text" fo:font-weight="bold" style:font-weight-asian="bold"/>
    </style:style>
    <style:style style:name="T1279" style:parent-style-name="DefaultParagraphFont" style:family="text">
      <style:text-properties style:font-name="Google Sans Text"/>
    </style:style>
    <style:style style:name="T1280" style:parent-style-name="SourceText" style:family="text">
      <style:text-properties style:font-name="Google Sans Text"/>
    </style:style>
    <style:style style:name="T1281" style:parent-style-name="DefaultParagraphFont" style:family="text">
      <style:text-properties style:font-name="Google Sans Text"/>
    </style:style>
    <style:style style:name="P1282" style:parent-style-name="Heading3" style:family="paragraph">
      <style:paragraph-properties fo:margin-top="0in" fo:margin-bottom="0.0972in" fo:line-height="112%"/>
      <style:text-properties style:font-name="Google Sans"/>
    </style:style>
    <style:style style:name="P1283" style:parent-style-name="Textbody" style:family="paragraph">
      <style:paragraph-properties fo:line-height="112%"/>
    </style:style>
    <style:style style:name="T1284" style:parent-style-name="DefaultParagraphFont" style:family="text">
      <style:text-properties style:font-name="Google Sans Text" fo:font-weight="bold" style:font-weight-asian="bold"/>
    </style:style>
    <style:style style:name="T1285" style:parent-style-name="DefaultParagraphFont" style:family="text">
      <style:text-properties style:font-name="Google Sans Text"/>
    </style:style>
    <style:style style:name="P1286" style:parent-style-name="Textbody" style:family="paragraph">
      <style:paragraph-properties fo:line-height="112%"/>
      <style:text-properties style:font-name="Google Sans Text" fo:font-weight="bold" style:font-weight-asian="bold"/>
    </style:style>
    <style:style style:name="P1287" style:parent-style-name="Textbody" style:family="paragraph">
      <style:paragraph-properties fo:line-height="112%"/>
    </style:style>
    <style:style style:name="T1288" style:parent-style-name="SourceText" style:family="text">
      <style:text-properties style:font-name="Google Sans Text" fo:font-weight="bold" style:font-weight-asian="bold"/>
    </style:style>
    <style:style style:name="T1289" style:parent-style-name="DefaultParagraphFont" style:family="text">
      <style:text-properties style:font-name="Google Sans Text" fo:font-weight="bold" style:font-weight-asian="bold"/>
    </style:style>
    <style:style style:name="T1290" style:parent-style-name="DefaultParagraphFont" style:family="text">
      <style:text-properties style:font-name="Google Sans Text"/>
    </style:style>
    <style:style style:name="T1291" style:parent-style-name="SourceText" style:family="text">
      <style:text-properties style:font-name="Google Sans Text"/>
    </style:style>
    <style:style style:name="T1292" style:parent-style-name="DefaultParagraphFont" style:family="text">
      <style:text-properties style:font-name="Google Sans Text"/>
    </style:style>
    <style:style style:name="P1293" style:parent-style-name="Textbody" style:family="paragraph">
      <style:paragraph-properties fo:line-height="112%"/>
    </style:style>
    <style:style style:name="T1294" style:parent-style-name="SourceText" style:family="text">
      <style:text-properties style:font-name="Google Sans Text" fo:font-weight="bold" style:font-weight-asian="bold"/>
    </style:style>
    <style:style style:name="T1295" style:parent-style-name="DefaultParagraphFont" style:family="text">
      <style:text-properties style:font-name="Google Sans Text" fo:font-weight="bold" style:font-weight-asian="bold"/>
    </style:style>
    <style:style style:name="T1296" style:parent-style-name="DefaultParagraphFont" style:family="text">
      <style:text-properties style:font-name="Google Sans Text"/>
    </style:style>
    <style:style style:name="P1297" style:parent-style-name="Textbody" style:family="paragraph">
      <style:paragraph-properties fo:line-height="112%"/>
    </style:style>
    <style:style style:name="T1298" style:parent-style-name="SourceText" style:family="text">
      <style:text-properties style:font-name="Google Sans Text" fo:font-weight="bold" style:font-weight-asian="bold"/>
    </style:style>
    <style:style style:name="T1299" style:parent-style-name="DefaultParagraphFont" style:family="text">
      <style:text-properties style:font-name="Google Sans Text" fo:font-weight="bold" style:font-weight-asian="bold"/>
    </style:style>
    <style:style style:name="T1300" style:parent-style-name="DefaultParagraphFont" style:family="text">
      <style:text-properties style:font-name="Google Sans Text"/>
    </style:style>
    <style:style style:name="P1301" style:parent-style-name="Heading3" style:family="paragraph">
      <style:paragraph-properties fo:margin-top="0in" fo:margin-bottom="0.0972in" fo:line-height="112%"/>
      <style:text-properties style:font-name="Google Sans"/>
    </style:style>
    <style:style style:name="P1302" style:parent-style-name="Textbody" style:family="paragraph">
      <style:paragraph-properties fo:line-height="112%"/>
    </style:style>
    <style:style style:name="T1303" style:parent-style-name="DefaultParagraphFont" style:family="text">
      <style:text-properties style:font-name="Google Sans Text" fo:font-weight="bold" style:font-weight-asian="bold"/>
    </style:style>
    <style:style style:name="T1304" style:parent-style-name="DefaultParagraphFont" style:family="text">
      <style:text-properties style:font-name="Google Sans Text"/>
    </style:style>
    <style:style style:name="P1305" style:parent-style-name="Textbody" style:family="paragraph">
      <style:paragraph-properties fo:line-height="112%"/>
    </style:style>
    <style:style style:name="T1306" style:parent-style-name="DefaultParagraphFont" style:family="text">
      <style:text-properties style:font-name="Google Sans Text" fo:font-weight="bold" style:font-weight-asian="bold"/>
    </style:style>
    <style:style style:name="T1307" style:parent-style-name="DefaultParagraphFont" style:family="text">
      <style:text-properties style:font-name="Google Sans Text"/>
    </style:style>
    <style:style style:name="P1308" style:parent-style-name="Textbody" style:family="paragraph">
      <style:paragraph-properties fo:line-height="112%"/>
    </style:style>
    <style:style style:name="T1309" style:parent-style-name="DefaultParagraphFont" style:family="text">
      <style:text-properties style:font-name="Google Sans Text" fo:font-weight="bold" style:font-weight-asian="bold"/>
    </style:style>
    <style:style style:name="T1310" style:parent-style-name="DefaultParagraphFont" style:family="text">
      <style:text-properties style:font-name="Google Sans Text"/>
    </style:style>
    <style:style style:name="P1311" style:parent-style-name="Heading3" style:family="paragraph">
      <style:paragraph-properties fo:margin-top="0in" fo:margin-bottom="0.0972in" fo:line-height="112%"/>
      <style:text-properties style:font-name="Google Sans"/>
    </style:style>
    <style:style style:name="P1312" style:parent-style-name="Textbody" style:family="paragraph">
      <style:paragraph-properties fo:line-height="112%"/>
    </style:style>
    <style:style style:name="T1313" style:parent-style-name="DefaultParagraphFont" style:family="text">
      <style:text-properties style:font-name="Google Sans Text" fo:font-weight="bold" style:font-weight-asian="bold"/>
    </style:style>
    <style:style style:name="T1314" style:parent-style-name="DefaultParagraphFont" style:family="text">
      <style:text-properties style:font-name="Google Sans Text"/>
    </style:style>
    <style:style style:name="P1315" style:parent-style-name="Textbody" style:family="paragraph">
      <style:paragraph-properties fo:line-height="112%"/>
    </style:style>
    <style:style style:name="T1316" style:parent-style-name="DefaultParagraphFont" style:family="text">
      <style:text-properties style:font-name="Google Sans Text" fo:font-weight="bold" style:font-weight-asian="bold"/>
    </style:style>
    <style:style style:name="T1317" style:parent-style-name="DefaultParagraphFont" style:family="text">
      <style:text-properties style:font-name="Google Sans Text"/>
    </style:style>
    <style:style style:name="T1318" style:parent-style-name="DefaultParagraphFont" style:family="text">
      <style:text-properties style:font-name="Google Sans Text"/>
    </style:style>
    <style:style style:name="T1319" style:parent-style-name="DefaultParagraphFont" style:family="text">
      <style:text-properties style:font-name="Google Sans Text"/>
    </style:style>
    <style:style style:name="P1320" style:parent-style-name="Textbody" style:family="paragraph">
      <style:paragraph-properties fo:line-height="112%"/>
    </style:style>
    <style:style style:name="T1321" style:parent-style-name="DefaultParagraphFont" style:family="text">
      <style:text-properties style:font-name="Google Sans Text" fo:font-weight="bold" style:font-weight-asian="bold"/>
    </style:style>
    <style:style style:name="T1322" style:parent-style-name="DefaultParagraphFont" style:family="text">
      <style:text-properties style:font-name="Google Sans Text"/>
    </style:style>
    <style:style style:name="T1323" style:parent-style-name="DefaultParagraphFont" style:family="text">
      <style:text-properties style:font-name="Google Sans Text" fo:font-style="italic" style:font-style-asian="italic"/>
    </style:style>
    <style:style style:name="T1324" style:parent-style-name="DefaultParagraphFont" style:family="text">
      <style:text-properties style:font-name="Google Sans Text"/>
    </style:style>
    <style:style style:name="P1325" style:parent-style-name="Heading3" style:family="paragraph">
      <style:paragraph-properties fo:margin-top="0in" fo:margin-bottom="0.0972in" fo:line-height="112%"/>
      <style:text-properties style:font-name="Google Sans"/>
    </style:style>
    <style:style style:name="P1326" style:parent-style-name="Textbody" style:family="paragraph">
      <style:paragraph-properties fo:line-height="112%"/>
    </style:style>
    <style:style style:name="T1327" style:parent-style-name="DefaultParagraphFont" style:family="text">
      <style:text-properties style:font-name="Google Sans Text" fo:font-weight="bold" style:font-weight-asian="bold"/>
    </style:style>
    <style:style style:name="T1328" style:parent-style-name="DefaultParagraphFont" style:family="text">
      <style:text-properties style:font-name="Google Sans Text"/>
    </style:style>
    <style:style style:name="P1329" style:parent-style-name="Textbody" style:family="paragraph">
      <style:paragraph-properties fo:line-height="112%"/>
    </style:style>
    <style:style style:name="T1330" style:parent-style-name="DefaultParagraphFont" style:family="text">
      <style:text-properties style:font-name="Google Sans Text" fo:font-weight="bold" style:font-weight-asian="bold"/>
    </style:style>
    <style:style style:name="T1331" style:parent-style-name="DefaultParagraphFont" style:family="text">
      <style:text-properties style:font-name="Google Sans Tex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Question 1: Write a C program to define 3 different threads with the following purposes where N is the input:</text:p>
      <text:p text:style-name="P3"><text:span text:style-name="T4"><text:s/></text:span><text:span text:style-name="T5"></text:span><text:span text:style-name="T6"><text:s/>Thread A: runs a loop and returns the sum of first N prime numbers</text:span></text:p>
      <text:p text:style-name="P7"><text:span text:style-name="T8"><text:s/></text:span><text:span text:style-name="T9"></text:span><text:span text:style-name="T10"><text:s/>Thread B &amp; C: should run in parallel — one prints "Thread 1 running" every 2 seconds, the other prints "Thread 2 running" every 3 seconds, both for 100 seconds.</text:span></text:p>
      <text:p text:style-name="P11"/>
      <text:p text:style-name="P12"><text:span text:style-name="T13">#include</text:span><text:span text:style-name="T14">&lt;stdio.h&gt;</text:span></text:p>
      <text:p text:style-name="P15"><text:span text:style-name="T16">#include</text:span><text:span text:style-name="T17">&lt;stdlib.h&gt;</text:span></text:p>
      <text:p text:style-name="P18"><text:span text:style-name="T19">#include</text:span><text:span text:style-name="T20">&lt;pthread.h&gt;</text:span></text:p>
      <text:p text:style-name="P21"><text:span text:style-name="T22">#include</text:span><text:span text:style-name="T23">&lt;stdbool.h&gt;</text:span></text:p>
      <text:p text:style-name="P24"><text:span text:style-name="T25">#include</text:span><text:span text:style-name="T26">&lt;unistd.h&gt;</text:span></text:p>
      <text:p text:style-name="P27"/>
      <text:p text:style-name="P28"><text:span text:style-name="T29">bool</text:span><text:span text:style-name="T30"><text:s/></text:span><text:span text:style-name="T31">isprime</text:span><text:span text:style-name="T32">(</text:span><text:span text:style-name="T33">int</text:span><text:span text:style-name="T34"><text:s/>n){</text:span></text:p>
      <text:p text:style-name="P35"><text:span text:style-name="T36">if</text:span><text:span text:style-name="T37">(n</text:span><text:span text:style-name="T38">&lt;</text:span><text:span text:style-name="T39">2</text:span><text:span text:style-name="T40">){</text:span></text:p>
      <text:p text:style-name="P41"><text:span text:style-name="T42">return</text:span><text:span text:style-name="T43"><text:s/></text:span><text:span text:style-name="T44">false</text:span><text:span text:style-name="T45">;</text:span></text:p>
      <text:p text:style-name="P46">}</text:p>
      <text:p text:style-name="P47"><text:span text:style-name="T48">for</text:span><text:span text:style-name="T49">(</text:span><text:span text:style-name="T50">int</text:span><text:span text:style-name="T51"><text:s/></text:span><text:span text:style-name="T52">i</text:span><text:span text:style-name="T53">=</text:span><text:span text:style-name="T54">2</text:span><text:span text:style-name="T55">;</text:span><text:span text:style-name="T56">i</text:span><text:span text:style-name="T57">*</text:span><text:span text:style-name="T58">i</text:span><text:span text:style-name="T59">&lt;=</text:span><text:span text:style-name="T60">n;</text:span><text:span text:style-name="T61">i</text:span><text:span text:style-name="T62">++</text:span><text:span text:style-name="T63">){</text:span></text:p>
      <text:p text:style-name="P64"><text:span text:style-name="T65">if</text:span><text:span text:style-name="T66">(n</text:span><text:span text:style-name="T67">%</text:span><text:span text:style-name="T68">i</text:span><text:span text:style-name="T69">==</text:span><text:span text:style-name="T70">0</text:span><text:span text:style-name="T71">){</text:span></text:p>
      <text:p text:style-name="P72"><text:span text:style-name="T73">return</text:span><text:span text:style-name="T74"><text:s/></text:span><text:span text:style-name="T75">false</text:span><text:span text:style-name="T76">;</text:span></text:p>
      <text:p text:style-name="P77">}</text:p>
      <text:p text:style-name="P78">}</text:p>
      <text:p text:style-name="P79"><text:span text:style-name="T80">return</text:span><text:span text:style-name="T81"><text:s/></text:span><text:span text:style-name="T82">true</text:span><text:span text:style-name="T83">;</text:span></text:p>
      <text:p text:style-name="P84">}</text:p>
      <text:p text:style-name="P85"/>
      <text:p text:style-name="P86">/*Thread A function*/</text:p>
      <text:p text:style-name="P87"><text:span text:style-name="T88">void</text:span><text:span text:style-name="T89">*</text:span><text:span text:style-name="T90"><text:s/></text:span><text:span text:style-name="T91">threadAsumofprimes</text:span><text:span text:style-name="T92">(</text:span><text:span text:style-name="T93">void</text:span><text:span text:style-name="T94">*</text:span><text:span text:style-name="T95"><text:s/>arg){</text:span></text:p>
      <text:p text:style-name="P96"><text:span text:style-name="T97">int</text:span><text:span text:style-name="T98"><text:s/></text:span><text:span text:style-name="T99">n</text:span><text:span text:style-name="T100"><text:s/></text:span><text:span text:style-name="T101">=</text:span><text:span text:style-name="T102"><text:s/></text:span><text:span text:style-name="T103">*</text:span><text:span text:style-name="T104">(</text:span><text:span text:style-name="T105">int</text:span><text:span text:style-name="T106">*</text:span><text:span text:style-name="T107">)arg;</text:span></text:p>
      <text:p text:style-name="P108"><text:span text:style-name="T109">long</text:span><text:span text:style-name="T110"><text:s/></text:span><text:span text:style-name="T111">long</text:span><text:span text:style-name="T112">*</text:span><text:span text:style-name="T113"><text:s/></text:span><text:span text:style-name="T114">sum</text:span><text:span text:style-name="T115"><text:s/></text:span><text:span text:style-name="T116">=</text:span><text:span text:style-name="T117"><text:s/>(</text:span><text:span text:style-name="T118">long</text:span><text:span text:style-name="T119"><text:s/></text:span><text:span text:style-name="T120">long</text:span><text:span text:style-name="T121">*</text:span><text:span text:style-name="T122">)</text:span><text:span text:style-name="T123">malloc</text:span><text:span text:style-name="T124">(</text:span><text:span text:style-name="T125">sizeof</text:span><text:span text:style-name="T126">(</text:span><text:span text:style-name="T127">long</text:span><text:span text:style-name="T128"><text:s/></text:span><text:span text:style-name="T129">long</text:span><text:span text:style-name="T130">));</text:span></text:p>
      <text:p text:style-name="P131"><text:span text:style-name="T132">*</text:span><text:span text:style-name="T133">sum</text:span><text:span text:style-name="T134"><text:s/></text:span><text:span text:style-name="T135">=</text:span><text:span text:style-name="T136"><text:s/></text:span><text:span text:style-name="T137">0</text:span><text:span text:style-name="T138">;</text:span></text:p>
      <text:p text:style-name="P139"><text:span text:style-name="T140">if</text:span><text:span text:style-name="T141">(</text:span><text:span text:style-name="T142">sum</text:span><text:span text:style-name="T143"><text:s/></text:span><text:span text:style-name="T144">==</text:span><text:span text:style-name="T145"><text:s/></text:span><text:span text:style-name="T146">NULL</text:span><text:span text:style-name="T147">){</text:span></text:p>
      <text:p text:style-name="P148"><text:span text:style-name="T149">printf</text:span><text:span text:style-name="T150">(</text:span><text:span text:style-name="T151">"memory hasnt been allocated"</text:span><text:span text:style-name="T152">);</text:span></text:p>
      <text:p text:style-name="P153"><text:span text:style-name="T154">pthread_exit</text:span><text:span text:style-name="T155">(</text:span><text:span text:style-name="T156">NULL</text:span><text:span text:style-name="T157">);</text:span></text:p>
      <text:p text:style-name="P158">}</text:p>
      <text:p text:style-name="P159"><text:span text:style-name="T160">int</text:span><text:span text:style-name="T161"><text:s/></text:span><text:span text:style-name="T162">count</text:span><text:span text:style-name="T163"><text:s/></text:span><text:span text:style-name="T164">=</text:span><text:span text:style-name="T165"><text:s/></text:span><text:span text:style-name="T166">0</text:span><text:span text:style-name="T167">;</text:span></text:p>
      <text:p text:style-name="P168"><text:span text:style-name="T169">int</text:span><text:span text:style-name="T170"><text:s/></text:span><text:span text:style-name="T171">current_num</text:span><text:span text:style-name="T172"><text:s/></text:span><text:span text:style-name="T173">=</text:span><text:span text:style-name="T174"><text:s/></text:span><text:span text:style-name="T175">2</text:span><text:span text:style-name="T176">;</text:span></text:p>
      <text:p text:style-name="P177"><text:span text:style-name="T178">while</text:span><text:span text:style-name="T179">(</text:span><text:span text:style-name="T180">count</text:span><text:span text:style-name="T181">&lt;</text:span><text:span text:style-name="T182">n</text:span><text:span text:style-name="T183">){</text:span></text:p>
      <text:p text:style-name="P184"><text:span text:style-name="T185">if</text:span><text:span text:style-name="T186">(</text:span><text:span text:style-name="T187">isprime</text:span><text:span text:style-name="T188">(</text:span><text:span text:style-name="T189">current_num</text:span><text:span text:style-name="T190">)){</text:span></text:p>
      <text:p text:style-name="P191"><text:span text:style-name="T192">*</text:span><text:span text:style-name="T193">sum</text:span><text:span text:style-name="T194"><text:s/></text:span><text:span text:style-name="T195">+=</text:span><text:span text:style-name="T196"><text:s/></text:span><text:span text:style-name="T197">current_num</text:span><text:span text:style-name="T198">;</text:span></text:p>
      <text:p text:style-name="P199"><text:span text:style-name="T200">count</text:span><text:span text:style-name="T201">++</text:span><text:span text:style-name="T202">;</text:span></text:p>
      <text:p text:style-name="P203">}</text:p>
      <text:p text:style-name="P204"><text:span text:style-name="T205">current_num</text:span><text:span text:style-name="T206">++</text:span><text:span text:style-name="T207">;</text:span></text:p>
      <text:p text:style-name="P208">}</text:p>
      <text:p text:style-name="P209"><text:span text:style-name="T210">return</text:span><text:span text:style-name="T211"><text:s/>(</text:span><text:span text:style-name="T212">void</text:span><text:span text:style-name="T213">*</text:span><text:span text:style-name="T214">)</text:span><text:span text:style-name="T215">sum</text:span><text:span text:style-name="T216">;</text:span></text:p>
      <text:p text:style-name="P217">}</text:p>
      <text:p text:style-name="P218"/>
      <text:p text:style-name="P219">/*Thread B function*/</text:p>
      <text:p text:style-name="P220"/>
      <text:p text:style-name="P221"><text:span text:style-name="T222">void</text:span><text:span text:style-name="T223">*</text:span><text:span text:style-name="T224"><text:s/></text:span><text:span text:style-name="T225">threadBfunctionrun</text:span><text:span text:style-name="T226">(</text:span><text:span text:style-name="T227">void</text:span><text:span text:style-name="T228"><text:s/></text:span><text:span text:style-name="T229">*</text:span><text:span text:style-name="T230">arg){</text:span></text:p>
      <text:p text:style-name="P231"><text:span text:style-name="T232">int</text:span><text:span text:style-name="T233"><text:s/></text:span><text:span text:style-name="T234">totaltime</text:span><text:span text:style-name="T235"><text:s/></text:span><text:span text:style-name="T236">=</text:span><text:span text:style-name="T237"><text:s/></text:span><text:span text:style-name="T238">100</text:span><text:span text:style-name="T239">;</text:span></text:p>
      <text:p text:style-name="P240"><text:span text:style-name="T241">int</text:span><text:span text:style-name="T242"><text:s/></text:span><text:span text:style-name="T243">interval</text:span><text:span text:style-name="T244"><text:s/></text:span><text:span text:style-name="T245">=</text:span><text:span text:style-name="T246"><text:s/></text:span><text:span text:style-name="T247">2</text:span><text:span text:style-name="T248">;</text:span></text:p>
      <text:soft-page-break/>
      <text:p text:style-name="P249"><text:span text:style-name="T250">for</text:span><text:span text:style-name="T251">(</text:span><text:span text:style-name="T252">int</text:span><text:span text:style-name="T253"><text:s/></text:span><text:span text:style-name="T254">i</text:span><text:span text:style-name="T255">=</text:span><text:span text:style-name="T256">0</text:span><text:span text:style-name="T257">;</text:span><text:span text:style-name="T258">i</text:span><text:span text:style-name="T259">&lt;</text:span><text:span text:style-name="T260">totaltime</text:span><text:span text:style-name="T261">;</text:span><text:span text:style-name="T262">i</text:span><text:span text:style-name="T263">=</text:span><text:span text:style-name="T264">i</text:span><text:span text:style-name="T265">+</text:span><text:span text:style-name="T266">interval</text:span><text:span text:style-name="T267">){</text:span></text:p>
      <text:p text:style-name="P268"><text:span text:style-name="T269">sleep</text:span><text:span text:style-name="T270">(</text:span><text:span text:style-name="T271">interval</text:span><text:span text:style-name="T272">);</text:span></text:p>
      <text:p text:style-name="P273"><text:span text:style-name="T274">printf</text:span><text:span text:style-name="T275">(</text:span><text:span text:style-name="T276">"Thread A is running</text:span><text:span text:style-name="T277">\n</text:span><text:span text:style-name="T278">"</text:span><text:span text:style-name="T279">);</text:span></text:p>
      <text:p text:style-name="P280">}</text:p>
      <text:p text:style-name="P281"><text:span text:style-name="T282">return</text:span><text:span text:style-name="T283"><text:s/></text:span><text:span text:style-name="T284">NULL</text:span><text:span text:style-name="T285">;</text:span></text:p>
      <text:p text:style-name="P286">}</text:p>
      <text:p text:style-name="P287">/*THread C function*/</text:p>
      <text:p text:style-name="P288"><text:span text:style-name="T289">void</text:span><text:span text:style-name="T290">*</text:span><text:span text:style-name="T291"><text:s/></text:span><text:span text:style-name="T292">threadCfunction</text:span><text:span text:style-name="T293">(</text:span><text:span text:style-name="T294">void</text:span><text:span text:style-name="T295">*</text:span><text:span text:style-name="T296"><text:s/>arg){</text:span></text:p>
      <text:p text:style-name="P297"><text:span text:style-name="T298">int</text:span><text:span text:style-name="T299"><text:s/></text:span><text:span text:style-name="T300">totaltime</text:span><text:span text:style-name="T301"><text:s/></text:span><text:span text:style-name="T302">=</text:span><text:span text:style-name="T303"><text:s/></text:span><text:span text:style-name="T304">100</text:span><text:span text:style-name="T305">;</text:span></text:p>
      <text:p text:style-name="P306"><text:span text:style-name="T307">int</text:span><text:span text:style-name="T308"><text:s/></text:span><text:span text:style-name="T309">interval</text:span><text:span text:style-name="T310"><text:s/></text:span><text:span text:style-name="T311">=</text:span><text:span text:style-name="T312"><text:s/></text:span><text:span text:style-name="T313">3</text:span><text:span text:style-name="T314">;</text:span></text:p>
      <text:p text:style-name="P315"><text:span text:style-name="T316">for</text:span><text:span text:style-name="T317">(</text:span><text:span text:style-name="T318">int</text:span><text:span text:style-name="T319"><text:s/></text:span><text:span text:style-name="T320">i</text:span><text:span text:style-name="T321">=</text:span><text:span text:style-name="T322">0</text:span><text:span text:style-name="T323">;</text:span><text:span text:style-name="T324">i</text:span><text:span text:style-name="T325">&lt;</text:span><text:span text:style-name="T326">totaltime</text:span><text:span text:style-name="T327">;</text:span><text:span text:style-name="T328">i</text:span><text:span text:style-name="T329">=</text:span><text:span text:style-name="T330">i</text:span><text:span text:style-name="T331">+</text:span><text:span text:style-name="T332">interval</text:span><text:span text:style-name="T333">){</text:span></text:p>
      <text:p text:style-name="P334"><text:span text:style-name="T335">sleep</text:span><text:span text:style-name="T336">(</text:span><text:span text:style-name="T337">interval</text:span><text:span text:style-name="T338">);</text:span></text:p>
      <text:p text:style-name="P339"><text:span text:style-name="T340">printf</text:span><text:span text:style-name="T341">(</text:span><text:span text:style-name="T342">"Thread B is running</text:span><text:span text:style-name="T343">\n</text:span><text:span text:style-name="T344">"</text:span><text:span text:style-name="T345">);</text:span></text:p>
      <text:p text:style-name="P346">}</text:p>
      <text:p text:style-name="P347"><text:span text:style-name="T348">return</text:span><text:span text:style-name="T349"><text:s/></text:span><text:span text:style-name="T350">NULL</text:span><text:span text:style-name="T351">;</text:span></text:p>
      <text:p text:style-name="P352">}</text:p>
      <text:p text:style-name="P353"/>
      <text:p text:style-name="P354"><text:span text:style-name="T355">int</text:span><text:span text:style-name="T356"><text:s/></text:span><text:span text:style-name="T357">main</text:span><text:span text:style-name="T358">(){</text:span></text:p>
      <text:p text:style-name="P359"><text:span text:style-name="T360">pthread_t</text:span><text:span text:style-name="T361"><text:s/></text:span><text:span text:style-name="T362">threadA</text:span><text:span text:style-name="T363">;</text:span></text:p>
      <text:p text:style-name="P364"><text:span text:style-name="T365">pthread_t</text:span><text:span text:style-name="T366"><text:s/></text:span><text:span text:style-name="T367">threadB</text:span><text:span text:style-name="T368">;</text:span></text:p>
      <text:p text:style-name="P369"><text:span text:style-name="T370">pthread_t</text:span><text:span text:style-name="T371"><text:s/></text:span><text:span text:style-name="T372">threadC</text:span><text:span text:style-name="T373">;</text:span></text:p>
      <text:p text:style-name="P374"><text:span text:style-name="T375">printf</text:span><text:span text:style-name="T376">(</text:span><text:span text:style-name="T377">"Till where do you want the sum of primes"</text:span><text:span text:style-name="T378">);</text:span></text:p>
      <text:p text:style-name="P379"><text:span text:style-name="T380">int</text:span><text:span text:style-name="T381"><text:s/></text:span><text:span text:style-name="T382">n</text:span><text:span text:style-name="T383">;</text:span></text:p>
      <text:p text:style-name="P384"><text:span text:style-name="T385">scanf</text:span><text:span text:style-name="T386">(</text:span><text:span text:style-name="T387">"</text:span><text:span text:style-name="T388">%d</text:span><text:span text:style-name="T389">"</text:span><text:span text:style-name="T390">,</text:span><text:span text:style-name="T391">&amp;</text:span><text:span text:style-name="T392">n</text:span><text:span text:style-name="T393">);</text:span></text:p>
      <text:p text:style-name="P394">/*Creation of Thread A*/</text:p>
      <text:p text:style-name="P395"><text:span text:style-name="T396">pthread_create</text:span><text:span text:style-name="T397">(</text:span><text:span text:style-name="T398">&amp;</text:span><text:span text:style-name="T399">threadA</text:span><text:span text:style-name="T400">,</text:span><text:span text:style-name="T401">NULL</text:span><text:span text:style-name="T402">,</text:span><text:span text:style-name="T403">threadAsumofprimes</text:span><text:span text:style-name="T404">,</text:span><text:span text:style-name="T405">&amp;</text:span><text:span text:style-name="T406">n</text:span><text:span text:style-name="T407">);</text:span></text:p>
      <text:p text:style-name="P408">/*Creation of Thread B*/</text:p>
      <text:p text:style-name="P409"><text:span text:style-name="T410">pthread_create</text:span><text:span text:style-name="T411">(</text:span><text:span text:style-name="T412">&amp;</text:span><text:span text:style-name="T413">threadB</text:span><text:span text:style-name="T414">,</text:span><text:span text:style-name="T415">NULL</text:span><text:span text:style-name="T416">,</text:span><text:span text:style-name="T417">threadBfunctionrun</text:span><text:span text:style-name="T418">,</text:span><text:span text:style-name="T419">NULL</text:span><text:span text:style-name="T420">);</text:span></text:p>
      <text:p text:style-name="P421">/*Creation of Thread C*/</text:p>
      <text:p text:style-name="P422"><text:span text:style-name="T423">pthread_create</text:span><text:span text:style-name="T424">(</text:span><text:span text:style-name="T425">&amp;</text:span><text:span text:style-name="T426">threadC</text:span><text:span text:style-name="T427">,</text:span><text:span text:style-name="T428">NULL</text:span><text:span text:style-name="T429">,</text:span><text:span text:style-name="T430">threadCfunction</text:span><text:span text:style-name="T431">,</text:span><text:span text:style-name="T432">NULL</text:span><text:span text:style-name="T433">);</text:span></text:p>
      <text:p text:style-name="P434"/>
      <text:p text:style-name="P435"><text:span text:style-name="T436">long</text:span><text:span text:style-name="T437"><text:s/></text:span><text:span text:style-name="T438">long</text:span><text:span text:style-name="T439">*</text:span><text:span text:style-name="T440"><text:s/></text:span><text:span text:style-name="T441">result</text:span><text:span text:style-name="T442">;</text:span></text:p>
      <text:p text:style-name="P443"/>
      <text:p text:style-name="P444"><text:span text:style-name="T445">pthread_join</text:span><text:span text:style-name="T446">(</text:span><text:span text:style-name="T447">threadA</text:span><text:span text:style-name="T448">,(</text:span><text:span text:style-name="T449">void</text:span><text:span text:style-name="T450">**</text:span><text:span text:style-name="T451">)</text:span><text:span text:style-name="T452">&amp;</text:span><text:span text:style-name="T453">result</text:span><text:span text:style-name="T454">);</text:span></text:p>
      <text:p text:style-name="P455"><text:span text:style-name="T456">printf</text:span><text:span text:style-name="T457">(</text:span><text:span text:style-name="T458">"THe result of thread A's function for the input<text:s/></text:span><text:span text:style-name="T459">%d</text:span><text:span text:style-name="T460"><text:s/>is<text:s/></text:span><text:span text:style-name="T461">%lld</text:span><text:span text:style-name="T462">"</text:span><text:span text:style-name="T463">,</text:span><text:span text:style-name="T464">n</text:span><text:span text:style-name="T465">,</text:span><text:span text:style-name="T466">*</text:span><text:span text:style-name="T467">result</text:span><text:span text:style-name="T468">);</text:span></text:p>
      <text:p text:style-name="P469"/>
      <text:p text:style-name="P470"><text:span text:style-name="T471">pthread_join</text:span><text:span text:style-name="T472">(</text:span><text:span text:style-name="T473">threadB</text:span><text:span text:style-name="T474">,</text:span><text:span text:style-name="T475">NULL</text:span><text:span text:style-name="T476">);</text:span></text:p>
      <text:p text:style-name="P477"><text:span text:style-name="T478">pthread_join</text:span><text:span text:style-name="T479">(</text:span><text:span text:style-name="T480">threadC</text:span><text:span text:style-name="T481">,</text:span><text:span text:style-name="T482">NULL</text:span><text:span text:style-name="T483">);</text:span></text:p>
      <text:p text:style-name="P484"/>
      <text:p text:style-name="P485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in" svg:y="0in" svg:width="5.60197in" svg:height="2.15079in" style:rel-width="scale" style:rel-height="scale"><draw:image xlink:href="media/image1.png" xlink:type="simple" xlink:show="embed" xlink:actuate="onLoad"/><svg:title/><svg:desc/></draw:frame><text:line-break/><text:s text:c="2"/><text:line-break/></text:p>
      <text:p text:style-name="Standard"><text:line-break/></text:p>
      <text:p text:style-name="P486"/>
      <text:p text:style-name="P487"><text:s text:c="2"/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>Question 2: In the above program:<text:s/></text:p>
      <text:p text:style-name="Standard"><text:span text:style-name="T499"></text:span><text:span text:style-name="T500"><text:s/>Add signal handling for SIGINT (etc) and prevent termination.<text:s/></text:span></text:p>
      <text:p text:style-name="Standard"><text:span text:style-name="T501"></text:span><text:span text:style-name="T502"><text:s/>Convert the above threads to individual functions and note down the time taken and the flow of execution.</text:span></text:p>
      <text:p text:style-name="P503"/>
      <text:p text:style-name="P504"/>
      <text:p text:style-name="Standard"><text:span text:style-name="T505">#include</text:span><text:span text:style-name="T506"><text:s/></text:span><text:span text:style-name="T507">&lt;stdio.h&gt;</text:span></text:p>
      <text:p text:style-name="P508"><text:span text:style-name="T509">#include</text:span><text:span text:style-name="T510"><text:s/></text:span><text:span text:style-name="T511">&lt;stdlib.h&gt;</text:span></text:p>
      <text:p text:style-name="P512"><text:span text:style-name="T513">#include</text:span><text:span text:style-name="T514"><text:s/></text:span><text:span text:style-name="T515">&lt;pthread.h&gt;</text:span></text:p>
      <text:p text:style-name="P516"><text:span text:style-name="T517">#include</text:span><text:span text:style-name="T518"><text:s/></text:span><text:span text:style-name="T519">&lt;stdbool.h&gt;</text:span></text:p>
      <text:p text:style-name="P520"><text:span text:style-name="T521">#include</text:span><text:span text:style-name="T522"><text:s/></text:span><text:span text:style-name="T523">&lt;unistd.h&gt;</text:span></text:p>
      <text:p text:style-name="P524"><text:span text:style-name="T525">#include</text:span><text:span text:style-name="T526"><text:s/></text:span><text:span text:style-name="T527">&lt;signal.h&gt;</text:span></text:p>
      <text:p text:style-name="P528"><text:span text:style-name="T529">#include</text:span><text:span text:style-name="T530"><text:s/></text:span><text:span text:style-name="T531">&lt;time.h&gt;</text:span></text:p>
      <text:p text:style-name="P532"/>
      <text:p text:style-name="P533"><text:span text:style-name="T534">void</text:span><text:span text:style-name="T535"><text:s/></text:span><text:span text:style-name="T536">handle_sigint</text:span><text:span text:style-name="T537">(</text:span><text:span text:style-name="T538">int</text:span><text:span text:style-name="T539"><text:s/>sig) {</text:span></text:p>
      <text:p text:style-name="P540"><text:span text:style-name="T541">printf</text:span><text:span text:style-name="T542">(</text:span><text:span text:style-name="T543">"</text:span><text:span text:style-name="T544">\n</text:span><text:span text:style-name="T545">&gt;&gt;&gt; [SIGNAL] Caught Ctrl+C (SIGINT). Prevention active: Termination blocked! &lt;&lt;&lt;</text:span><text:span text:style-name="T546">\n\n</text:span><text:span text:style-name="T547">"</text:span><text:span text:style-name="T548">);</text:span></text:p>
      <text:p text:style-name="P549">}</text:p>
      <text:p text:style-name="P550"/>
      <text:p text:style-name="P551"><text:span text:style-name="T552">bool</text:span><text:span text:style-name="T553"><text:s/></text:span><text:span text:style-name="T554">isprime</text:span><text:span text:style-name="T555">(</text:span><text:span text:style-name="T556">int</text:span><text:span text:style-name="T557"><text:s/>n){</text:span></text:p>
      <text:p text:style-name="P558"><text:span text:style-name="T559">if</text:span><text:span text:style-name="T560">(n<text:s/></text:span><text:span text:style-name="T561">&lt;</text:span><text:span text:style-name="T562"><text:s/></text:span><text:span text:style-name="T563">2</text:span><text:span text:style-name="T564">)<text:s/></text:span><text:span text:style-name="T565">return</text:span><text:span text:style-name="T566"><text:s/></text:span><text:span text:style-name="T567">false</text:span><text:span text:style-name="T568">;</text:span></text:p>
      <text:p text:style-name="P569"><text:span text:style-name="T570">for</text:span><text:span text:style-name="T571">(</text:span><text:span text:style-name="T572">int</text:span><text:span text:style-name="T573"><text:s/></text:span><text:span text:style-name="T574">i</text:span><text:span text:style-name="T575"><text:s/></text:span><text:span text:style-name="T576">=</text:span><text:span text:style-name="T577"><text:s/></text:span><text:span text:style-name="T578">2</text:span><text:span text:style-name="T579">;<text:s/></text:span><text:span text:style-name="T580">i</text:span><text:span text:style-name="T581"><text:s/></text:span><text:span text:style-name="T582">*</text:span><text:span text:style-name="T583"><text:s/></text:span><text:span text:style-name="T584">i</text:span><text:span text:style-name="T585"><text:s/></text:span><text:span text:style-name="T586">&lt;=</text:span><text:span text:style-name="T587"><text:s/>n;<text:s/></text:span><text:span text:style-name="T588">i</text:span><text:span text:style-name="T589">++</text:span><text:span text:style-name="T590">){</text:span></text:p>
      <text:p text:style-name="P591"><text:span text:style-name="T592">if</text:span><text:span text:style-name="T593">(n<text:s/></text:span><text:span text:style-name="T594">%</text:span><text:span text:style-name="T595"><text:s/></text:span><text:span text:style-name="T596">i</text:span><text:span text:style-name="T597"><text:s/></text:span><text:span text:style-name="T598">==</text:span><text:span text:style-name="T599"><text:s/></text:span><text:span text:style-name="T600">0</text:span><text:span text:style-name="T601">)<text:s/></text:span><text:span text:style-name="T602">return</text:span><text:span text:style-name="T603"><text:s/></text:span><text:span text:style-name="T604">false</text:span><text:span text:style-name="T605">;</text:span></text:p>
      <text:p text:style-name="P606">}</text:p>
      <text:p text:style-name="P607"><text:span text:style-name="T608">return</text:span><text:span text:style-name="T609"><text:s/></text:span><text:span text:style-name="T610">true</text:span><text:span text:style-name="T611">;</text:span></text:p>
      <text:p text:style-name="P612">}</text:p>
      <text:p text:style-name="P613"/>
      <text:p text:style-name="P614">/* Core Logic Function (Can be run as a thread or a normal function) */</text:p>
      <text:p text:style-name="P615"><text:span text:style-name="T616">void</text:span><text:span text:style-name="T617">*</text:span><text:span text:style-name="T618"><text:s/></text:span><text:span text:style-name="T619">threadAsumofprimes</text:span><text:span text:style-name="T620">(</text:span><text:span text:style-name="T621">void</text:span><text:span text:style-name="T622">*</text:span><text:span text:style-name="T623"><text:s/>arg){</text:span></text:p>
      <text:p text:style-name="P624"><text:span text:style-name="T625">int</text:span><text:span text:style-name="T626"><text:s/></text:span><text:span text:style-name="T627">n</text:span><text:span text:style-name="T628"><text:s/></text:span><text:span text:style-name="T629">=</text:span><text:span text:style-name="T630"><text:s/></text:span><text:span text:style-name="T631">*</text:span><text:span text:style-name="T632">(</text:span><text:span text:style-name="T633">int</text:span><text:span text:style-name="T634">*</text:span><text:span text:style-name="T635">)arg;</text:span></text:p>
      <text:p text:style-name="P636"><text:span text:style-name="T637">long</text:span><text:span text:style-name="T638"><text:s/></text:span><text:span text:style-name="T639">long</text:span><text:span text:style-name="T640">*</text:span><text:span text:style-name="T641"><text:s/></text:span><text:span text:style-name="T642">sum</text:span><text:span text:style-name="T643"><text:s/></text:span><text:span text:style-name="T644">=</text:span><text:span text:style-name="T645"><text:s/>(</text:span><text:span text:style-name="T646">long</text:span><text:span text:style-name="T647"><text:s/></text:span><text:span text:style-name="T648">long</text:span><text:span text:style-name="T649">*</text:span><text:span text:style-name="T650">)</text:span><text:span text:style-name="T651">malloc</text:span><text:span text:style-name="T652">(</text:span><text:span text:style-name="T653">sizeof</text:span><text:span text:style-name="T654">(</text:span><text:span text:style-name="T655">long</text:span><text:span text:style-name="T656"><text:s/></text:span><text:span text:style-name="T657">long</text:span><text:span text:style-name="T658">));</text:span></text:p>
      <text:p text:style-name="P659"><text:span text:style-name="T660">if</text:span><text:span text:style-name="T661">(</text:span><text:span text:style-name="T662">sum</text:span><text:span text:style-name="T663"><text:s/></text:span><text:span text:style-name="T664">==</text:span><text:span text:style-name="T665"><text:s/></text:span><text:span text:style-name="T666">NULL</text:span><text:span text:style-name="T667">){</text:span></text:p>
      <text:p text:style-name="P668"><text:span text:style-name="T669">printf</text:span><text:span text:style-name="T670">(</text:span><text:span text:style-name="T671">"Memory allocation failed</text:span><text:span text:style-name="T672">\n</text:span><text:span text:style-name="T673">"</text:span><text:span text:style-name="T674">);</text:span></text:p>
      <text:p text:style-name="P675"><text:span text:style-name="T676">pthread_exit</text:span><text:span text:style-name="T677">(</text:span><text:span text:style-name="T678">NULL</text:span><text:span text:style-name="T679">);</text:span></text:p>
      <text:p text:style-name="P680">}</text:p>
      <text:p text:style-name="P681"><text:span text:style-name="T682">*</text:span><text:span text:style-name="T683">sum</text:span><text:span text:style-name="T684"><text:s/></text:span><text:span text:style-name="T685">=</text:span><text:span text:style-name="T686"><text:s/></text:span><text:span text:style-name="T687">0</text:span><text:span text:style-name="T688">;</text:span></text:p>
      <text:soft-page-break/>
      <text:p text:style-name="P689"><text:span text:style-name="T690">int</text:span><text:span text:style-name="T691"><text:s/></text:span><text:span text:style-name="T692">count</text:span><text:span text:style-name="T693"><text:s/></text:span><text:span text:style-name="T694">=</text:span><text:span text:style-name="T695"><text:s/></text:span><text:span text:style-name="T696">0</text:span><text:span text:style-name="T697">;</text:span></text:p>
      <text:p text:style-name="P698"><text:span text:style-name="T699">int</text:span><text:span text:style-name="T700"><text:s/></text:span><text:span text:style-name="T701">current_num</text:span><text:span text:style-name="T702"><text:s/></text:span><text:span text:style-name="T703">=</text:span><text:span text:style-name="T704"><text:s/></text:span><text:span text:style-name="T705">2</text:span><text:span text:style-name="T706">;</text:span></text:p>
      <text:p text:style-name="P707"><text:span text:style-name="T708">while</text:span><text:span text:style-name="T709">(</text:span><text:span text:style-name="T710">count</text:span><text:span text:style-name="T711"><text:s/></text:span><text:span text:style-name="T712">&lt;</text:span><text:span text:style-name="T713"><text:s/></text:span><text:span text:style-name="T714">n</text:span><text:span text:style-name="T715">){</text:span></text:p>
      <text:p text:style-name="P716"><text:span text:style-name="T717">if</text:span><text:span text:style-name="T718">(</text:span><text:span text:style-name="T719">isprime</text:span><text:span text:style-name="T720">(</text:span><text:span text:style-name="T721">current_num</text:span><text:span text:style-name="T722">)){</text:span></text:p>
      <text:p text:style-name="P723"><text:span text:style-name="T724">*</text:span><text:span text:style-name="T725">sum</text:span><text:span text:style-name="T726"><text:s/></text:span><text:span text:style-name="T727">+=</text:span><text:span text:style-name="T728"><text:s/></text:span><text:span text:style-name="T729">current_num</text:span><text:span text:style-name="T730">;</text:span></text:p>
      <text:p text:style-name="P731"><text:span text:style-name="T732">count</text:span><text:span text:style-name="T733">++</text:span><text:span text:style-name="T734">;</text:span></text:p>
      <text:p text:style-name="P735">}</text:p>
      <text:p text:style-name="P736"><text:span text:style-name="T737">current_num</text:span><text:span text:style-name="T738">++</text:span><text:span text:style-name="T739">;</text:span></text:p>
      <text:p text:style-name="P740">}</text:p>
      <text:p text:style-name="P741"><text:span text:style-name="T742">return</text:span><text:span text:style-name="T743"><text:s/>(</text:span><text:span text:style-name="T744">void</text:span><text:span text:style-name="T745">*</text:span><text:span text:style-name="T746">)</text:span><text:span text:style-name="T747">sum</text:span><text:span text:style-name="T748">;</text:span></text:p>
      <text:p text:style-name="P749">}</text:p>
      <text:p text:style-name="P750"/>
      <text:p text:style-name="P751">/* Function B (Simulates 10 seconds total duration for demo speed instead of 100s) */</text:p>
      <text:p text:style-name="P752"><text:span text:style-name="T753">void</text:span><text:span text:style-name="T754">*</text:span><text:span text:style-name="T755"><text:s/></text:span><text:span text:style-name="T756">threadBfunctionrun</text:span><text:span text:style-name="T757">(</text:span><text:span text:style-name="T758">void</text:span><text:span text:style-name="T759"><text:s/></text:span><text:span text:style-name="T760">*</text:span><text:span text:style-name="T761">arg){</text:span></text:p>
      <text:p text:style-name="P762"><text:span text:style-name="T763">int</text:span><text:span text:style-name="T764"><text:s/></text:span><text:span text:style-name="T765">totaltime</text:span><text:span text:style-name="T766"><text:s/></text:span><text:span text:style-name="T767">=</text:span><text:span text:style-name="T768"><text:s/></text:span><text:span text:style-name="T769">10</text:span><text:span text:style-name="T770">;</text:span><text:span text:style-name="T771"><text:s/></text:span><text:span text:style-name="T772">// Reduced from 100 to 10 for quick testing</text:span></text:p>
      <text:p text:style-name="P773"><text:span text:style-name="T774">int</text:span><text:span text:style-name="T775"><text:s/></text:span><text:span text:style-name="T776">interval</text:span><text:span text:style-name="T777"><text:s/></text:span><text:span text:style-name="T778">=</text:span><text:span text:style-name="T779"><text:s/></text:span><text:span text:style-name="T780">2</text:span><text:span text:style-name="T781">;</text:span></text:p>
      <text:p text:style-name="P782"><text:span text:style-name="T783">for</text:span><text:span text:style-name="T784">(</text:span><text:span text:style-name="T785">int</text:span><text:span text:style-name="T786"><text:s/></text:span><text:span text:style-name="T787">i</text:span><text:span text:style-name="T788"><text:s/></text:span><text:span text:style-name="T789">=</text:span><text:span text:style-name="T790"><text:s/></text:span><text:span text:style-name="T791">0</text:span><text:span text:style-name="T792">;<text:s/></text:span><text:span text:style-name="T793">i</text:span><text:span text:style-name="T794"><text:s/></text:span><text:span text:style-name="T795">&lt;</text:span><text:span text:style-name="T796"><text:s/></text:span><text:span text:style-name="T797">totaltime</text:span><text:span text:style-name="T798">;<text:s/></text:span><text:span text:style-name="T799">i</text:span><text:span text:style-name="T800"><text:s/></text:span><text:span text:style-name="T801">=</text:span><text:span text:style-name="T802"><text:s/></text:span><text:span text:style-name="T803">i</text:span><text:span text:style-name="T804"><text:s/></text:span><text:span text:style-name="T805">+</text:span><text:span text:style-name="T806"><text:s/></text:span><text:span text:style-name="T807">interval</text:span><text:span text:style-name="T808">){</text:span></text:p>
      <text:p text:style-name="P809"><text:span text:style-name="T810">sleep</text:span><text:span text:style-name="T811">(</text:span><text:span text:style-name="T812">interval</text:span><text:span text:style-name="T813">);</text:span></text:p>
      <text:p text:style-name="P814"><text:span text:style-name="T815">printf</text:span><text:span text:style-name="T816">(</text:span><text:span text:style-name="T817">"Thread 1 (2s interval) running</text:span><text:span text:style-name="T818">\n</text:span><text:span text:style-name="T819">"</text:span><text:span text:style-name="T820">);</text:span></text:p>
      <text:p text:style-name="P821">}</text:p>
      <text:p text:style-name="P822"><text:span text:style-name="T823">return</text:span><text:span text:style-name="T824"><text:s/></text:span><text:span text:style-name="T825">NULL</text:span><text:span text:style-name="T826">;</text:span></text:p>
      <text:p text:style-name="P827">}</text:p>
      <text:p text:style-name="P828"/>
      <text:p text:style-name="P829">/* Function C */</text:p>
      <text:p text:style-name="P830"><text:span text:style-name="T831">void</text:span><text:span text:style-name="T832">*</text:span><text:span text:style-name="T833"><text:s/></text:span><text:span text:style-name="T834">threadCfunction</text:span><text:span text:style-name="T835">(</text:span><text:span text:style-name="T836">void</text:span><text:span text:style-name="T837">*</text:span><text:span text:style-name="T838"><text:s/>arg){</text:span></text:p>
      <text:p text:style-name="P839"><text:span text:style-name="T840">int</text:span><text:span text:style-name="T841"><text:s/></text:span><text:span text:style-name="T842">totaltime</text:span><text:span text:style-name="T843"><text:s/></text:span><text:span text:style-name="T844">=</text:span><text:span text:style-name="T845"><text:s/></text:span><text:span text:style-name="T846">10</text:span><text:span text:style-name="T847">;</text:span><text:span text:style-name="T848"><text:s/></text:span><text:span text:style-name="T849">// Reduced from 100 to 10 for quick testing</text:span></text:p>
      <text:p text:style-name="P850"><text:span text:style-name="T851">int</text:span><text:span text:style-name="T852"><text:s/></text:span><text:span text:style-name="T853">interval</text:span><text:span text:style-name="T854"><text:s/></text:span><text:span text:style-name="T855">=</text:span><text:span text:style-name="T856"><text:s/></text:span><text:span text:style-name="T857">3</text:span><text:span text:style-name="T858">;</text:span></text:p>
      <text:p text:style-name="P859"><text:span text:style-name="T860">for</text:span><text:span text:style-name="T861">(</text:span><text:span text:style-name="T862">int</text:span><text:span text:style-name="T863"><text:s/></text:span><text:span text:style-name="T864">i</text:span><text:span text:style-name="T865"><text:s/></text:span><text:span text:style-name="T866">=</text:span><text:span text:style-name="T867"><text:s/></text:span><text:span text:style-name="T868">0</text:span><text:span text:style-name="T869">;<text:s/></text:span><text:span text:style-name="T870">i</text:span><text:span text:style-name="T871"><text:s/></text:span><text:span text:style-name="T872">&lt;</text:span><text:span text:style-name="T873"><text:s/></text:span><text:span text:style-name="T874">totaltime</text:span><text:span text:style-name="T875">;<text:s/></text:span><text:span text:style-name="T876">i</text:span><text:span text:style-name="T877"><text:s/></text:span><text:span text:style-name="T878">=</text:span><text:span text:style-name="T879"><text:s/></text:span><text:span text:style-name="T880">i</text:span><text:span text:style-name="T881"><text:s/></text:span><text:span text:style-name="T882">+</text:span><text:span text:style-name="T883"><text:s/></text:span><text:span text:style-name="T884">interval</text:span><text:span text:style-name="T885">){</text:span></text:p>
      <text:p text:style-name="P886"><text:span text:style-name="T887">sleep</text:span><text:span text:style-name="T888">(</text:span><text:span text:style-name="T889">interval</text:span><text:span text:style-name="T890">);</text:span></text:p>
      <text:p text:style-name="P891"><text:span text:style-name="T892">printf</text:span><text:span text:style-name="T893">(</text:span><text:span text:style-name="T894">"Thread 2 (3s interval) running</text:span><text:span text:style-name="T895">\n</text:span><text:span text:style-name="T896">"</text:span><text:span text:style-name="T897">);</text:span></text:p>
      <text:p text:style-name="P898">}</text:p>
      <text:p text:style-name="P899"><text:span text:style-name="T900">return</text:span><text:span text:style-name="T901"><text:s/></text:span><text:span text:style-name="T902">NULL</text:span><text:span text:style-name="T903">;</text:span></text:p>
      <text:p text:style-name="P904">}</text:p>
      <text:p text:style-name="P905"/>
      <text:p text:style-name="P906"><text:span text:style-name="T907">int</text:span><text:span text:style-name="T908"><text:s/></text:span><text:span text:style-name="T909">main</text:span><text:span text:style-name="T910">(){</text:span></text:p>
      <text:p text:style-name="P911">// Register the custom SIGINT handler</text:p>
      <text:p text:style-name="P912"><text:span text:style-name="T913">signal</text:span><text:span text:style-name="T914">(</text:span><text:span text:style-name="T915">SIGINT</text:span><text:span text:style-name="T916">,<text:s/></text:span><text:span text:style-name="T917">handle_sigint</text:span><text:span text:style-name="T918">);</text:span></text:p>
      <text:p text:style-name="P919"/>
      <text:p text:style-name="P920"><text:span text:style-name="T921">pthread_t</text:span><text:span text:style-name="T922"><text:s/></text:span><text:span text:style-name="T923">threadA</text:span><text:span text:style-name="T924">,<text:s/></text:span><text:span text:style-name="T925">threadB</text:span><text:span text:style-name="T926">,<text:s/></text:span><text:span text:style-name="T927">threadC</text:span><text:span text:style-name="T928">;</text:span></text:p>
      <text:p text:style-name="P929"><text:span text:style-name="T930">int</text:span><text:span text:style-name="T931"><text:s/></text:span><text:span text:style-name="T932">n</text:span><text:span text:style-name="T933"><text:s/></text:span><text:span text:style-name="T934">=</text:span><text:span text:style-name="T935"><text:s/></text:span><text:span text:style-name="T936">30</text:span><text:span text:style-name="T937">;</text:span><text:span text:style-name="T938"><text:s/></text:span><text:span text:style-name="T939">// Pre-set target input for easy benchmarking</text:span></text:p>
      <text:p text:style-name="P940"><text:span text:style-name="T941">long</text:span><text:span text:style-name="T942"><text:s/></text:span><text:span text:style-name="T943">long</text:span><text:span text:style-name="T944">*</text:span><text:span text:style-name="T945"><text:s/></text:span><text:span text:style-name="T946">result</text:span><text:span text:style-name="T947">;</text:span></text:p>
      <text:p text:style-name="P948"><text:span text:style-name="T949">time_t</text:span><text:span text:style-name="T950"><text:s/></text:span><text:span text:style-name="T951">start_time</text:span><text:span text:style-name="T952">,<text:s/></text:span><text:span text:style-name="T953">end_time</text:span><text:span text:style-name="T954">;</text:span></text:p>
      <text:p text:style-name="P955"/>
      <text:p text:style-name="P956"><text:span text:style-name="T957">printf</text:span><text:span text:style-name="T958">(</text:span><text:span text:style-name="T959">"===========================================</text:span><text:span text:style-name="T960">\n</text:span><text:span text:style-name="T961">"</text:span><text:span text:style-name="T962">);</text:span></text:p>
      <text:p text:style-name="P963"><text:span text:style-name="T964">printf</text:span><text:span text:style-name="T965">(</text:span><text:span text:style-name="T966">"RUNNING TEST 1: THREADED (PARALLEL) EXECUTION</text:span><text:span text:style-name="T967">\n</text:span><text:span text:style-name="T968">"</text:span><text:span text:style-name="T969">);</text:span></text:p>
      <text:p text:style-name="P970"><text:span text:style-name="T971">printf</text:span><text:span text:style-name="T972">(</text:span><text:span text:style-name="T973">"===========================================</text:span><text:span text:style-name="T974">\n</text:span><text:span text:style-name="T975">"</text:span><text:span text:style-name="T976">);</text:span></text:p>
      <text:p text:style-name="P977"><text:span text:style-name="T978">printf</text:span><text:span text:style-name="T979">(</text:span><text:span text:style-name="T980">"(Try pressing Ctrl+C while this runs!)</text:span><text:span text:style-name="T981">\n\n</text:span><text:span text:style-name="T982">"</text:span><text:span text:style-name="T983">);</text:span></text:p>
      <text:p text:style-name="P984"><text:span text:style-name="T985">start_time</text:span><text:span text:style-name="T986"><text:s/></text:span><text:span text:style-name="T987">=</text:span><text:span text:style-name="T988"><text:s/></text:span><text:span text:style-name="T989">time</text:span><text:span text:style-name="T990">(</text:span><text:span text:style-name="T991">NULL</text:span><text:span text:style-name="T992">);</text:span></text:p>
      <text:p text:style-name="P993"/>
      <text:p text:style-name="P994">/* Creation of Threads running in parallel */</text:p>
      <text:p text:style-name="P995"><text:span text:style-name="T996">pthread_create</text:span><text:span text:style-name="T997">(</text:span><text:span text:style-name="T998">&amp;</text:span><text:span text:style-name="T999">threadA</text:span><text:span text:style-name="T1000">,<text:s/></text:span><text:span text:style-name="T1001">NULL</text:span><text:span text:style-name="T1002">,<text:s/></text:span><text:span text:style-name="T1003">threadAsumofprimes</text:span><text:span text:style-name="T1004">,<text:s/></text:span><text:span text:style-name="T1005">&amp;</text:span><text:span text:style-name="T1006">n</text:span><text:span text:style-name="T1007">);</text:span></text:p>
      <text:soft-page-break/>
      <text:p text:style-name="P1008"><text:span text:style-name="T1009">pthread_create</text:span><text:span text:style-name="T1010">(</text:span><text:span text:style-name="T1011">&amp;</text:span><text:span text:style-name="T1012">threadB</text:span><text:span text:style-name="T1013">,<text:s/></text:span><text:span text:style-name="T1014">NULL</text:span><text:span text:style-name="T1015">,<text:s/></text:span><text:span text:style-name="T1016">threadBfunctionrun</text:span><text:span text:style-name="T1017">,<text:s/></text:span><text:span text:style-name="T1018">NULL</text:span><text:span text:style-name="T1019">);</text:span></text:p>
      <text:p text:style-name="P1020"><text:span text:style-name="T1021">pthread_create</text:span><text:span text:style-name="T1022">(</text:span><text:span text:style-name="T1023">&amp;</text:span><text:span text:style-name="T1024">threadC</text:span><text:span text:style-name="T1025">,<text:s/></text:span><text:span text:style-name="T1026">NULL</text:span><text:span text:style-name="T1027">,<text:s/></text:span><text:span text:style-name="T1028">threadCfunction</text:span><text:span text:style-name="T1029">,<text:s/></text:span><text:span text:style-name="T1030">NULL</text:span><text:span text:style-name="T1031">);</text:span></text:p>
      <text:p text:style-name="P1032"/>
      <text:p text:style-name="P1033">/* Wait for parallel execution to finish */</text:p>
      <text:p text:style-name="P1034"><text:span text:style-name="T1035">pthread_join</text:span><text:span text:style-name="T1036">(</text:span><text:span text:style-name="T1037">threadA</text:span><text:span text:style-name="T1038">, (</text:span><text:span text:style-name="T1039">void</text:span><text:span text:style-name="T1040">**</text:span><text:span text:style-name="T1041">)</text:span><text:span text:style-name="T1042">&amp;</text:span><text:span text:style-name="T1043">result</text:span><text:span text:style-name="T1044">);</text:span></text:p>
      <text:p text:style-name="P1045"><text:span text:style-name="T1046">if</text:span><text:span text:style-name="T1047">(</text:span><text:span text:style-name="T1048">result</text:span><text:span text:style-name="T1049"><text:s/></text:span><text:span text:style-name="T1050">!=</text:span><text:span text:style-name="T1051"><text:s/></text:span><text:span text:style-name="T1052">NULL</text:span><text:span text:style-name="T1053">) {</text:span></text:p>
      <text:p text:style-name="P1054"><text:span text:style-name="T1055">printf</text:span><text:span text:style-name="T1056">(</text:span><text:span text:style-name="T1057">"</text:span><text:span text:style-name="T1058">\n</text:span><text:span text:style-name="T1059">[Parallel] Sum of primes result:<text:s/></text:span><text:span text:style-name="T1060">%lld\n</text:span><text:span text:style-name="T1061">"</text:span><text:span text:style-name="T1062">,<text:s/></text:span><text:span text:style-name="T1063">*</text:span><text:span text:style-name="T1064">result</text:span><text:span text:style-name="T1065">);</text:span></text:p>
      <text:p text:style-name="P1066"><text:span text:style-name="T1067">free</text:span><text:span text:style-name="T1068">(</text:span><text:span text:style-name="T1069">result</text:span><text:span text:style-name="T1070">);</text:span></text:p>
      <text:p text:style-name="P1071">}</text:p>
      <text:p text:style-name="P1072"><text:span text:style-name="T1073">pthread_join</text:span><text:span text:style-name="T1074">(</text:span><text:span text:style-name="T1075">threadB</text:span><text:span text:style-name="T1076">,<text:s/></text:span><text:span text:style-name="T1077">NULL</text:span><text:span text:style-name="T1078">);</text:span></text:p>
      <text:p text:style-name="P1079"><text:span text:style-name="T1080">pthread_join</text:span><text:span text:style-name="T1081">(</text:span><text:span text:style-name="T1082">threadC</text:span><text:span text:style-name="T1083">,<text:s/></text:span><text:span text:style-name="T1084">NULL</text:span><text:span text:style-name="T1085">);</text:span></text:p>
      <text:p text:style-name="P1086"/>
      <text:p text:style-name="P1087"><text:span text:style-name="T1088">end_time</text:span><text:span text:style-name="T1089"><text:s/></text:span><text:span text:style-name="T1090">=</text:span><text:span text:style-name="T1091"><text:s/></text:span><text:span text:style-name="T1092">time</text:span><text:span text:style-name="T1093">(</text:span><text:span text:style-name="T1094">NULL</text:span><text:span text:style-name="T1095">);</text:span></text:p>
      <text:p text:style-name="P1096"><text:span text:style-name="T1097">double</text:span><text:span text:style-name="T1098"><text:s/></text:span><text:span text:style-name="T1099">parallel_time</text:span><text:span text:style-name="T1100"><text:s/></text:span><text:span text:style-name="T1101">=</text:span><text:span text:style-name="T1102"><text:s/></text:span><text:span text:style-name="T1103">difftime</text:span><text:span text:style-name="T1104">(</text:span><text:span text:style-name="T1105">end_time</text:span><text:span text:style-name="T1106">,<text:s/></text:span><text:span text:style-name="T1107">start_time</text:span><text:span text:style-name="T1108">);</text:span></text:p>
      <text:p text:style-name="P1109"><text:span text:style-name="T1110">printf</text:span><text:span text:style-name="T1111">(</text:span><text:span text:style-name="T1112">"--&gt; Total Time taken with Threads:<text:s/></text:span><text:span text:style-name="T1113">%.2f</text:span><text:span text:style-name="T1114"><text:s/>seconds</text:span><text:span text:style-name="T1115">\n\n</text:span><text:span text:style-name="T1116">"</text:span><text:span text:style-name="T1117">,<text:s/></text:span><text:span text:style-name="T1118">parallel_time</text:span><text:span text:style-name="T1119">);</text:span></text:p>
      <text:p text:style-name="P1120"/>
      <text:p text:style-name="P1121"><text:span text:style-name="T1122">printf</text:span><text:span text:style-name="T1123">(</text:span><text:span text:style-name="T1124">"===========================================</text:span><text:span text:style-name="T1125">\n</text:span><text:span text:style-name="T1126">"</text:span><text:span text:style-name="T1127">);</text:span></text:p>
      <text:p text:style-name="P1128"><text:span text:style-name="T1129">printf</text:span><text:span text:style-name="T1130">(</text:span><text:span text:style-name="T1131">"RUNNING TEST 2: INDIVIDUAL FUNCTIONS (SEQUENTIAL)</text:span><text:span text:style-name="T1132">\n</text:span><text:span text:style-name="T1133">"</text:span><text:span text:style-name="T1134">);</text:span></text:p>
      <text:p text:style-name="P1135"><text:span text:style-name="T1136">printf</text:span><text:span text:style-name="T1137">(</text:span><text:span text:style-name="T1138">"===========================================</text:span><text:span text:style-name="T1139">\n</text:span><text:span text:style-name="T1140">"</text:span><text:span text:style-name="T1141">);</text:span></text:p>
      <text:p text:style-name="P1142"><text:span text:style-name="T1143">start_time</text:span><text:span text:style-name="T1144"><text:s/></text:span><text:span text:style-name="T1145">=</text:span><text:span text:style-name="T1146"><text:s/></text:span><text:span text:style-name="T1147">time</text:span><text:span text:style-name="T1148">(</text:span><text:span text:style-name="T1149">NULL</text:span><text:span text:style-name="T1150">);</text:span></text:p>
      <text:p text:style-name="P1151"/>
      <text:p text:style-name="P1152">/* Running sequentially one after another as individual normal functions */</text:p>
      <text:p text:style-name="P1153"><text:span text:style-name="T1154">result</text:span><text:span text:style-name="T1155"><text:s/></text:span><text:span text:style-name="T1156">=</text:span><text:span text:style-name="T1157"><text:s/>(</text:span><text:span text:style-name="T1158">long</text:span><text:span text:style-name="T1159"><text:s/></text:span><text:span text:style-name="T1160">long</text:span><text:span text:style-name="T1161">*</text:span><text:span text:style-name="T1162">)</text:span><text:span text:style-name="T1163">threadAsumofprimes</text:span><text:span text:style-name="T1164">(</text:span><text:span text:style-name="T1165">&amp;</text:span><text:span text:style-name="T1166">n</text:span><text:span text:style-name="T1167">);</text:span></text:p>
      <text:p text:style-name="P1168"><text:span text:style-name="T1169">if</text:span><text:span text:style-name="T1170">(</text:span><text:span text:style-name="T1171">result</text:span><text:span text:style-name="T1172"><text:s/></text:span><text:span text:style-name="T1173">!=</text:span><text:span text:style-name="T1174"><text:s/></text:span><text:span text:style-name="T1175">NULL</text:span><text:span text:style-name="T1176">) {</text:span></text:p>
      <text:p text:style-name="P1177"><text:span text:style-name="T1178">printf</text:span><text:span text:style-name="T1179">(</text:span><text:span text:style-name="T1180">"</text:span><text:span text:style-name="T1181">\n</text:span><text:span text:style-name="T1182">[Sequential] Sum of primes result:<text:s/></text:span><text:span text:style-name="T1183">%lld\n</text:span><text:span text:style-name="T1184">"</text:span><text:span text:style-name="T1185">,<text:s/></text:span><text:span text:style-name="T1186">*</text:span><text:span text:style-name="T1187">result</text:span><text:span text:style-name="T1188">);</text:span></text:p>
      <text:p text:style-name="P1189"><text:span text:style-name="T1190">free</text:span><text:span text:style-name="T1191">(</text:span><text:span text:style-name="T1192">result</text:span><text:span text:style-name="T1193">);</text:span></text:p>
      <text:p text:style-name="P1194">}</text:p>
      <text:p text:style-name="P1195"><text:span text:style-name="T1196">printf</text:span><text:span text:style-name="T1197">(</text:span><text:span text:style-name="T1198">"Starting Function B sequentially...</text:span><text:span text:style-name="T1199">\n</text:span><text:span text:style-name="T1200">"</text:span><text:span text:style-name="T1201">);</text:span></text:p>
      <text:p text:style-name="P1202"><text:span text:style-name="T1203">threadBfunctionrun</text:span><text:span text:style-name="T1204">(</text:span><text:span text:style-name="T1205">NULL</text:span><text:span text:style-name="T1206">);</text:span></text:p>
      <text:p text:style-name="P1207"><text:span text:style-name="T1208">printf</text:span><text:span text:style-name="T1209">(</text:span><text:span text:style-name="T1210">"Starting Function C sequentially...</text:span><text:span text:style-name="T1211">\n</text:span><text:span text:style-name="T1212">"</text:span><text:span text:style-name="T1213">);</text:span></text:p>
      <text:p text:style-name="P1214"><text:span text:style-name="T1215">threadCfunction</text:span><text:span text:style-name="T1216">(</text:span><text:span text:style-name="T1217">NULL</text:span><text:span text:style-name="T1218">);</text:span></text:p>
      <text:p text:style-name="P1219"/>
      <text:p text:style-name="P1220"><text:span text:style-name="T1221">end_time</text:span><text:span text:style-name="T1222"><text:s/></text:span><text:span text:style-name="T1223">=</text:span><text:span text:style-name="T1224"><text:s/></text:span><text:span text:style-name="T1225">time</text:span><text:span text:style-name="T1226">(</text:span><text:span text:style-name="T1227">NULL</text:span><text:span text:style-name="T1228">);</text:span></text:p>
      <text:p text:style-name="P1229"><text:span text:style-name="T1230">double</text:span><text:span text:style-name="T1231"><text:s/></text:span><text:span text:style-name="T1232">sequential_time</text:span><text:span text:style-name="T1233"><text:s/></text:span><text:span text:style-name="T1234">=</text:span><text:span text:style-name="T1235"><text:s/></text:span><text:span text:style-name="T1236">difftime</text:span><text:span text:style-name="T1237">(</text:span><text:span text:style-name="T1238">end_time</text:span><text:span text:style-name="T1239">,<text:s/></text:span><text:span text:style-name="T1240">start_time</text:span><text:span text:style-name="T1241">);</text:span></text:p>
      <text:p text:style-name="P1242"><text:span text:style-name="T1243">printf</text:span><text:span text:style-name="T1244">(</text:span><text:span text:style-name="T1245">"--&gt; Total Time taken sequentially:<text:s/></text:span><text:span text:style-name="T1246">%.2f</text:span><text:span text:style-name="T1247"><text:s/>seconds</text:span><text:span text:style-name="T1248">\n</text:span><text:span text:style-name="T1249">"</text:span><text:span text:style-name="T1250">,<text:s/></text:span><text:span text:style-name="T1251">sequential_time</text:span><text:span text:style-name="T1252">);</text:span></text:p>
      <text:p text:style-name="P1253"><text:span text:style-name="T1254">printf</text:span><text:span text:style-name="T1255">(</text:span><text:span text:style-name="T1256">"===========================================</text:span><text:span text:style-name="T1257">\n</text:span><text:span text:style-name="T1258">"</text:span><text:span text:style-name="T1259">);</text:span></text:p>
      <text:p text:style-name="P1260"/>
      <text:p text:style-name="P1261"><text:span text:style-name="T1262">return</text:span><text:span text:style-name="T1263"><text:s/></text:span><text:span text:style-name="T1264">0</text:span><text:span text:style-name="T1265">;</text:span></text:p>
      <text:p text:style-name="P1266">}</text:p>
      <text:p text:style-name="Standard"/>
      <text:p text:style-name="Standard"><draw:frame draw:z-index="2" draw:style-name="a1" draw:name="Image3" text:anchor-type="paragraph" svg:x="0.10433in" svg:y="2.79173in" svg:width="6.69291in" svg:height="0.5633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z-index="251659264" draw:style-name="a2" draw:name="Image2" text:anchor-type="paragraph" svg:x="0in" svg:y="0in" svg:width="6.33346in" svg:height="5.75in" style:rel-width="scale" style:rel-height="scale"><draw:image xlink:href="media/image3.png" xlink:type="simple" xlink:show="embed" xlink:actuate="onLoad"/><svg:title/><svg:desc/></draw:frame><text:line-break/></text:p>
      <text:p text:style-name="Standard"/>
      <text:p text:style-name="Standard">Question 3: Explain the terms<text:line-break/><text:line-break/><text:span text:style-name="T1267">1. Child Process –<text:s/></text:span><text:span text:style-name="T1268">fork()</text:span></text:p>
      <text:list text:style-name="LFO1" text:continue-numbering="true">
        <text:list-item>
          <text:p text:style-name="P1269"><text:span text:style-name="T1270">Definition:</text:span><text:span text:style-name="T1271"><text:s/>A system call that creates a brand-new, independent child process by duplicating the parent's address space.</text:span></text:p>
        </text:list-item>
        <text:list-item>
          <text:p text:style-name="P1272"><text:span text:style-name="T1273">Return Value:</text:span><text:span text:style-name="T1274"><text:s/>It is called once but returns twice. It returns the child's PID to the parent process, and returns<text:s/></text:span><text:span text:style-name="T1275">0</text:span><text:span text:style-name="T1276"><text:s/>inside the new child process.</text:span></text:p>
        </text:list-item>
        <text:list-item>
          <text:p text:style-name="P1277"><text:span text:style-name="T1278">Execution:</text:span><text:span text:style-name="T1279"><text:s/>Both parent and child execute concurrently starting from the exact line immediately following the<text:s/></text:span><text:span text:style-name="T1280">fork()</text:span><text:span text:style-name="T1281"><text:s/>call.</text:span></text:p>
        </text:list-item>
      </text:list>
      <text:h text:style-name="P1282" text:outline-level="3">2. Handling Common Signals</text:h>
      <text:list text:style-name="LFO2" text:continue-numbering="true">
        <text:list-item>
          <text:p text:style-name="P1283"><text:span text:style-name="T1284">Concept:</text:span><text:span text:style-name="T1285"><text:s/>Signals are asynchronous kernel notifications sent to a running program.</text:span></text:p>
        </text:list-item>
        <text:list-item>
          <text:p text:style-name="P1286">Common Signals:</text:p>
          <text:soft-page-break/>
          <text:list text:continue-numbering="true">
            <text:list-item>
              <text:p text:style-name="P1287"><text:span text:style-name="T1288">SIGINT</text:span><text:span text:style-name="T1289"><text:s/>(Signal 2):</text:span><text:span text:style-name="T1290"><text:s/>Triggered by<text:s/></text:span><text:span text:style-name="T1291">Ctrl + C</text:span><text:span text:style-name="T1292">. Default action is termination, but it can be safely caught/blocked via a custom signal handler.</text:span></text:p>
            </text:list-item>
            <text:list-item>
              <text:p text:style-name="P1293"><text:span text:style-name="T1294">SIGKILL</text:span><text:span text:style-name="T1295"><text:s/>(Signal 9):</text:span><text:span text:style-name="T1296"><text:s/>Forces immediate program termination. It cannot be caught, blocked, or ignored.</text:span></text:p>
            </text:list-item>
            <text:list-item>
              <text:p text:style-name="P1297"><text:span text:style-name="T1298">SIGSEGV</text:span><text:span text:style-name="T1299"><text:s/>(Signal 11):</text:span><text:span text:style-name="T1300"><text:s/>A Segmentation Fault, sent when a program tries to access restricted or illegal memory space.</text:span></text:p>
            </text:list-item>
          </text:list>
        </text:list-item>
      </text:list>
      <text:h text:style-name="P1301" text:outline-level="3">3. Exploring Different Kernel Crashes</text:h>
      <text:list text:style-name="LFO3" text:continue-numbering="true">
        <text:list-item>
          <text:p text:style-name="P1302"><text:span text:style-name="T1303">Kernel Panic:</text:span><text:span text:style-name="T1304"><text:s/>A fatal internal error from which the OS kernel cannot safely recover (e.g., severe hardware failure or corrupted system files). The entire machine halts immediately to prevent data loss.</text:span></text:p>
        </text:list-item>
        <text:list-item>
          <text:p text:style-name="P1305"><text:span text:style-name="T1306">Oops:</text:span><text:span text:style-name="T1307"><text:s/>A non-fatal kernel deviation. The OS prints an error log and kills the offending process, attempting to keep the rest of the system running.</text:span></text:p>
        </text:list-item>
        <text:list-item>
          <text:p text:style-name="P1308"><text:span text:style-name="T1309">BSOD:</text:span><text:span text:style-name="T1310"><text:s/>Blue Screen of Death; the specific Windows operating system equivalent of a fatal kernel panic.</text:span></text:p>
        </text:list-item>
      </text:list>
      <text:h text:style-name="P1311" text:outline-level="3">4. Time Complexity</text:h>
      <text:list text:style-name="LFO4" text:continue-numbering="true">
        <text:list-item>
          <text:p text:style-name="P1312"><text:span text:style-name="T1313">Definition:</text:span><text:span text:style-name="T1314"><text:s/>Measures how an algorithm's execution time scales asymptotically as the input size <text:s/>grows, denoted in Big-O notation.</text:span></text:p>
        </text:list-item>
        <text:list-item>
          <text:p text:style-name="P1315"><text:span text:style-name="T1316">Application:</text:span><text:span text:style-name="T1317"><text:s/>In our lab code, the prime checker function runs in<text:s/></text:span><text:span text:style-name="T1318">O(sqrt(N))</text:span><text:span text:style-name="T1319"><text:s/>time due to trial division.</text:span></text:p>
        </text:list-item>
        <text:list-item>
          <text:p text:style-name="P1320"><text:span text:style-name="T1321">Threads Impact:</text:span><text:span text:style-name="T1322"><text:s/>Spawning multiple threads lowers real-world<text:s/></text:span><text:span text:style-name="T1323">wall-clock execution time</text:span><text:span text:style-name="T1324"><text:s/>by utilizing multiple CPU cores, but it does not change the core mathematical Big-O complexity of the underlying algorithm.</text:span></text:p>
        </text:list-item>
      </text:list>
      <text:h text:style-name="P1325" text:outline-level="3">5. Locking Mechanisms – Mutex vs. Spinlock</text:h>
      <text:list text:style-name="LFO5" text:continue-numbering="true">
        <text:list-item>
          <text:p text:style-name="P1326"><text:span text:style-name="T1327">Mutex (Mutual Exclusion):</text:span><text:span text:style-name="T1328"><text:s/>A sleeping lock. If a thread finds the lock taken, it yields the CPU and goes to sleep. This is highly efficient for long waiting periods but incurs context-switch overhead.</text:span></text:p>
        </text:list-item>
        <text:list-item>
          <text:p text:style-name="P1329"><text:span text:style-name="T1330">Spinlock:</text:span><text:span text:style-name="T1331"><text:s/>A busy-wait lock. The waiting thread stays awake and runs a continuous loop ("spins") checking the lock until it becomes free. This consumes 100% CPU on that core but is ideal for ultra-short critical sections because it avoids context-switching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ystem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hargav Simha Handebagh</dc:creator>
    <meta:creation-date>2026-06-07T20:39:00Z</meta:creation-date>
    <dc:date>2026-06-07T16:14:00Z</dc:date>
    <meta:template xlink:href="Normal" xlink:type="simple"/>
    <meta:editing-cycles>3</meta:editing-cycles>
    <meta:editing-duration>PT900S</meta:editing-duration>
    <meta:document-statistic meta:page-count="7" meta:paragraph-count="15" meta:word-count="1172" meta:character-count="7841" meta:row-count="55" meta:non-whitespace-character-count="6684"/>
  </office:meta>
</office:document-meta>
</file>